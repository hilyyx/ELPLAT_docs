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3.40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3.037cm"/>
    </style:style>
    <style:style style:name="co7" style:family="table-column">
      <style:table-column-properties fo:break-before="auto" style:column-width="2.226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2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Главная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Excel_20_Built-in_20_Normal" style:data-style-name="N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Excel_20_Built-in_20_Normal" style:data-style-name="N100">
      <style:table-cell-properties style:diagonal-bl-tr="none" style:diagonal-tl-br="none"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Excel_20_Built-in_20_Normal" style:data-style-name="N100">
      <style:table-cell-properties style:diagonal-bl-tr="none" style:diagonal-tl-br="none"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Normal" style:data-style-name="N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lr-tb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lr-tb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Excel_20_Built-in_20_Normal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Excel_20_Built-in_20_Normal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Excel_20_Built-in_20_Normal" style:data-style-name="N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Arial1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Excel_20_Built-in_20_Normal" style:data-style-name="N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Excel_20_Built-in_20_Normal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Excel_20_Built-in_20_Normal" style:data-style-name="N100">
      <style:table-cell-properties style:diagonal-bl-tr="none" style:diagonal-tl-br="none" style:text-align-source="fix" style:repeat-content="false" fo:border="none" style:rotation-align="none"/>
      <style:paragraph-properties fo:text-align="start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 style:data-style-name="N100">
      <style:table-cell-properties style:diagonal-bl-tr="none" style:diagonal-tl-br="none" style:text-align-source="fix" style:repeat-content="false" fo:border="none" style:rotation-align="none"/>
      <style:paragraph-properties fo:text-align="start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Excel_20_Built-in_20_Normal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rotation-align="none"/>
    </style:style>
    <style:style style:name="ce60" style:family="table-cell" style:parent-style-name="Excel_20_Built-in_20_Normal">
      <style:text-properties fo:color="#000000" style:font-name="Calibri" fo:font-size="9pt" fo:language="ru" fo:country="RU" fo:font-weight="normal" style:text-underline-mode="continuous" style:text-overline-mode="continuous" style:text-line-through-mode="continuous" style:font-name-asian="Segoe UI" style:font-size-asian="9pt" style:language-asian="zh" style:country-asian="CN" style:font-weight-asian="normal" style:font-size-complex="9pt" style:language-complex="hi" style:country-complex="IN" style:font-weight-complex="normal" style:text-emphasize="none" style:font-relief="none" style:text-overline-style="none" style:text-overline-color="font-color"/>
    </style:style>
    <style:style style:name="ce36" style:family="table-cell" style:parent-style-name="Excel_20_Built-in_20_Normal">
      <style:text-properties style:font-name="Calibri" fo:font-size="9pt" fo:language="ru" fo:country="RU" style:text-underline-mode="continuous" style:text-overline-mode="continuous" style:text-line-through-mode="continuous" style:font-size-asian="9pt" style:language-asian="ru" style:country-asian="RU" style:font-size-complex="9pt" style:language-complex="ar" style:country-complex="SA" style:text-emphasize="none" style:font-relief="none" style:text-overline-style="none" style:text-overline-color="font-color"/>
    </style:style>
    <style:style style:name="ce34" style:family="table-cell" style:parent-style-name="Excel_20_Built-in_20_Normal">
      <style:table-cell-properties fo:border="none"/>
      <style:text-properties style:font-name="Calibri" fo:font-size="9pt" fo:language="ru" fo:country="RU" fo:font-weight="normal" style:text-underline-mode="continuous" style:text-overline-mode="continuous" style:text-line-through-mode="continuous" style:font-size-asian="9pt" style:language-asian="ru" style:country-asian="RU" style:font-weight-asian="normal" style:font-size-complex="9pt" style:language-complex="ar" style:country-complex="SA" style:font-weight-complex="normal" style:text-emphasize="none" style:font-relief="none" style:text-overline-style="none" style:text-overline-color="font-color"/>
    </style:style>
    <style:style style:name="ce44" style:family="table-cell" style:parent-style-name="Excel_20_Built-in_20_Normal">
      <style:text-properties fo:font-size="9pt" fo:language="ru" fo:country="RU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5" style:family="table-cell" style:parent-style-name="Excel_20_Built-in_20_Normal">
      <style:text-properties style:font-name="Calibri" fo:font-size="9pt" fo:language="ru" fo:country="RU" fo:font-weight="normal" style:text-underline-mode="continuous" style:text-overline-mode="continuous" style:text-line-through-mode="continuous" style:font-size-asian="9pt" style:language-asian="ru" style:country-asian="RU" style:font-weight-asian="normal" style:font-size-complex="9pt" style:language-complex="ar" style:country-complex="SA" style:font-weight-complex="normal" style:text-emphasize="none" style:font-relief="none" style:text-overline-style="none" style:text-overline-color="font-color"/>
    </style:style>
    <style:style style:name="ce23" style:family="table-cell" style:parent-style-name="Excel_20_Built-in_20_Normal">
      <style:text-properties fo:font-size="9pt" fo:language="ru" fo:country="RU" style:text-underline-mode="continuous" style:text-overline-mode="continuous" style:text-line-through-mode="continuous" style:font-size-asian="9pt" style:language-asian="en" style:country-asian="US" style:font-size-complex="9pt" style:language-complex="ar" style:country-complex="SA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lr-tb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lr-tb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8" style:family="table-cell" style:parent-style-name="Excel_20_Built-in_20_Normal">
      <style:table-cell-properties fo:background-color="transparent"/>
      <style:text-properties fo:font-size="9pt" fo:language="ru" fo:country="RU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ru" style:country-asian="RU" style:font-style-asian="normal" style:font-weight-asian="norm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Excel_20_Built-in_20_Normal">
      <style:table-cell-properties fo:border="none"/>
      <style:text-properties style:font-name="Calibri" fo:font-size="9pt" fo:language="ru" fo:country="RU" style:text-underline-mode="continuous" style:text-overline-mode="continuous" style:text-line-through-mode="continuous" style:font-size-asian="9pt" style:language-asian="ru" style:country-asian="RU" style:font-size-complex="9pt" style:language-complex="ar" style:country-complex="SA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2" style:family="table-cell" style:parent-style-name="Excel_20_Built-in_20_Normal">
      <style:table-cell-properties fo:background-color="transparent"/>
      <style:text-properties style:font-name="Calibri" fo:font-size="9pt" fo:language="ru" fo:country="RU" fo:font-weight="normal" style:text-underline-mode="continuous" style:text-overline-mode="continuous" style:text-line-through-mode="continuous" style:font-size-asian="9pt" style:language-asian="ru" style:country-asian="RU" style:font-weight-asian="normal" style:font-size-complex="9pt" style:language-complex="ar" style:country-complex="SA" style:font-weight-complex="normal" style:text-emphasize="none" style:font-relief="none" style:text-overline-style="none" style:text-overline-color="font-color"/>
    </style:style>
    <style:style style:name="ce104" style:family="table-cell" style:parent-style-name="Excel_20_Built-in_20_Normal">
      <style:table-cell-properties fo:background-color="transparent" fo:border="none"/>
      <style:text-properties style:font-name="Calibri" fo:font-size="9pt" fo:language="ru" fo:country="RU" fo:font-weight="normal" style:text-underline-mode="continuous" style:text-overline-mode="continuous" style:text-line-through-mode="continuous" style:font-size-asian="9pt" style:language-asian="ru" style:country-asian="RU" style:font-weight-asian="normal" style:font-size-complex="9pt" style:language-complex="ar" style:country-complex="SA" style:font-weight-complex="normal" style:text-emphasize="none" style:font-relief="none" style:text-overline-style="none" style:text-overline-color="font-color"/>
    </style:style>
    <style:style style:name="ce108" style:family="table-cell" style:parent-style-name="Excel_20_Built-in_20_Normal">
      <style:table-cell-properties fo:border="none"/>
      <style:text-properties fo:color="#000000" style:font-name="Calibri" fo:font-size="9pt" fo:language="ru" fo:country="RU" fo:font-weight="normal" style:text-underline-mode="continuous" style:text-overline-mode="continuous" style:text-line-through-mode="continuous" style:font-size-asian="9pt" style:language-asian="ru" style:country-asian="RU" style:font-weight-asian="normal" style:font-size-complex="9pt" style:language-complex="ar" style:country-complex="SA" style:font-weight-complex="normal" style:text-emphasize="none" style:font-relief="none" style:text-overline-style="none" style:text-overline-color="font-color"/>
    </style:style>
    <style:style style:name="ce68" style:family="table-cell" style:parent-style-name="Excel_20_Built-in_20_Normal">
      <style:table-cell-properties fo:border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70" style:family="table-cell" style:parent-style-name="Excel_20_Built-in_20_Normal">
      <style:table-cell-properties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ce77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Excel_20_Built-in_20_Normal">
      <style:text-properties style:font-name="Calibri" fo:font-size="9pt" fo:font-weight="normal" style:font-size-asian="9pt" style:font-weight-asian="normal" style:font-size-complex="9pt" style:font-weight-complex="normal"/>
    </style:style>
    <style:style style:name="ce66" style:family="table-cell" style:parent-style-name="Default">
      <style:text-properties style:font-name="Calibri" fo:font-size="9pt" fo:font-weight="normal" style:font-size-asian="9pt" style:font-weight-asian="normal" style:font-size-complex="9pt" style:font-weight-complex="normal"/>
    </style:style>
    <style:style style:name="ce134" style:family="table-cell" style:parent-style-name="Excel_20_Built-in_20_Normal">
      <style:table-cell-properties fo:border="none"/>
      <style:text-properties fo:color="#000000" style:font-name="Calibri" fo:font-size="9pt" fo:font-weight="normal" style:font-size-asian="9pt" style:font-weight-asian="normal" style:font-size-complex="9pt" style:font-weight-complex="normal"/>
    </style:style>
    <style:style style:name="ce74" style:family="table-cell" style:parent-style-name="Excel_20_Built-in_20_Normal">
      <style:table-cell-properties fo:border="none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fo:background-color="transparent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125" style:family="table-cell" style:parent-style-name="Excel_20_Built-in_20_Normal">
      <style:table-cell-properties fo:background-color="transparent" fo:border="none"/>
      <style:text-properties fo:color="#000000" style:font-name="Calibri" fo:font-size="9pt" fo:font-weight="normal" style:font-size-asian="9pt" style:font-weight-asian="normal" style:font-size-complex="9pt" style:font-weight-complex="normal"/>
    </style:style>
    <style:style style:name="ce75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6" style:family="table-cell" style:parent-style-name="Excel_20_Built-in_20_Normal">
      <style:table-cell-properties fo:border="none"/>
      <style:text-properties fo:color="#000000" style:text-outline="false" style:text-line-through-style="none" style:text-line-through-type="none" style:font-name="Calibri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86" style:family="table-cell" style:parent-style-name="Excel_20_Built-in_20_Normal">
      <style:table-cell-properties fo:background-color="transparent" fo:border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8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>
      <style:table-cell-properties fo:border="none"/>
      <style:text-properties fo:color="#000000" style:font-name="Calibri" fo:font-size="9pt" fo:language="ru" fo:country="RU" fo:font-weight="normal" style:text-underline-mode="continuous" style:text-overline-mode="continuous" style:text-line-through-mode="continuous" style:font-size-asian="9pt" style:language-asian="en" style:country-asian="US" style:font-weight-asian="normal" style:font-size-complex="9pt" style:language-complex="ar" style:country-complex="SA" style:font-weight-complex="normal" style:text-emphasize="none" style:font-relief="none" style:text-overline-style="none" style:text-overline-color="font-color"/>
    </style:style>
    <style:style style:name="ce88" style:family="table-cell" style:parent-style-name="Excel_20_Built-in_20_Normal">
      <style:table-cell-properties style:diagonal-bl-tr="none" style:diagonal-tl-br="none" fo:background-color="transparent" style:rotation-align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140" style:family="table-cell" style:parent-style-name="Excel_20_Built-in_20_Normal">
      <style:table-cell-properties fo:background-color="transparent" fo:border="none"/>
      <style:text-properties fo:color="#000000" style:font-name="Calibri" fo:font-size="9pt" fo:language="ru" fo:country="RU" fo:font-weight="normal" style:text-underline-mode="continuous" style:text-overline-mode="continuous" style:text-line-through-mode="continuous" style:font-size-asian="9pt" style:language-asian="en" style:country-asian="US" style:font-weight-asian="normal" style:font-size-complex="9pt" style:language-complex="ar" style:country-complex="SA" style:font-weight-complex="normal" style:text-emphasize="none" style:font-relief="none" style:text-overline-style="none" style:text-overline-color="font-color"/>
    </style:style>
    <style:style style:name="ce39" style:family="table-cell" style:parent-style-name="Excel_20_Built-in_20_Normal">
      <style:table-cell-properties style:diagonal-bl-tr="none" style:diagonal-tl-br="none" style:rotation-align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144" style:family="table-cell" style:parent-style-name="Excel_20_Built-in_20_Normal">
      <style:table-cell-properties fo:border="none"/>
      <style:text-properties style:font-name="Calibri" fo:font-size="9pt" fo:language="ru" fo:country="RU" fo:font-weight="normal" style:text-underline-mode="continuous" style:text-overline-mode="continuous" style:text-line-through-mode="continuous" style:font-size-asian="9pt" style:language-asian="en" style:country-asian="US" style:font-weight-asian="normal" style:font-size-complex="9pt" style:language-complex="ar" style:country-complex="SA" style:font-weight-complex="normal" style:text-emphasize="none" style:font-relief="none" style:text-overline-style="none" style:text-overline-color="font-color"/>
    </style:style>
    <style:style style:name="ce147" style:family="table-cell" style:parent-style-name="Excel_20_Built-in_20_Normal">
      <style:table-cell-properties fo:border="none"/>
      <style:text-properties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Excel_20_Built-in_20_Normal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9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fo:border="none" style:rotation-align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ce120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1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3" style:family="table-cell" style:parent-style-name="Excel_20_Built-in_20_Normal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7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2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137" style:family="table-cell" style:parent-style-name="Excel_20_Built-in_20_Normal" style:data-style-name="N2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8" style:family="table-cell" style:parent-style-name="Excel_20_Built-in_20_Normal" style:data-style-name="N2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Excel_20_Built-in_20_Normal" style:data-style-name="N2">
      <style:table-cell-properties fo:background-color="#ffffff" style:diagonal-bl-tr="none" style:diagonal-tl-br="none" style:rotation-align="none"/>
      <style:text-properties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Excel_20_Built-in_20_Normal" style:data-style-name="N2">
      <style:table-cell-properties fo:background-color="#ffffff" style:diagonal-bl-tr="none" style:diagonal-tl-br="none" style:rotation-align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142" style:family="table-cell" style:parent-style-name="Excel_20_Built-in_20_Normal" style:data-style-name="N2">
      <style:table-cell-properties style:diagonal-bl-tr="none" style:diagonal-tl-br="none" style:rotation-align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143" style:family="table-cell" style:parent-style-name="Excel_20_Built-in_20_Normal" style:data-style-name="N2">
      <style:table-cell-properties style:diagonal-bl-tr="none" style:diagonal-tl-br="none" style:rotation-align="none"/>
      <style:text-properties style:text-outline="false" style:text-line-through-style="none" style:text-line-through-type="none" style:font-name="Calibri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8" style:family="table-cell" style:parent-style-name="Default">
      <style:table-cell-properties fo:background-color="#ffffff" style:diagonal-bl-tr="none" style:diagonal-tl-br="none" style:rotation-align="none"/>
    </style:style>
    <style:style style:name="ce92" style:family="table-cell" style:parent-style-name="Default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rotation-align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-complex="Arial" style:font-size-asian="8pt" style:font-size-complex="8pt" style:font-weight-asian="bold" style:font-weight-complex="bold"/>
    </style:style>
    <style:style style:name="T3" style:family="text">
      <style:text-properties style:use-window-font-color="true" style:font-name="Calibri" fo:language="ru" fo:country="RU" style:language-asian="en" style:country-asian="US" style:language-complex="ar" style:country-complex="SA" style:font-name-asian="Calibri" style:font-name-complex="Calibr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Главная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22"/>
        <table:table-column table:style-name="co7" table:default-cell-style-name="ce122"/>
        <table:table-column table:style-name="co8" table:default-cell-style-name="ce122"/>
        <table:table-column table:style-name="co9" table:default-cell-style-name="ce122"/>
        <table:table-column table:style-name="co10" table:default-cell-style-name="ce141"/>
        <table:table-column table:style-name="co10" table:number-columns-repeated="19" table:default-cell-style-name="ce122"/>
        <table:table-column table:style-name="co10" table:number-columns-repeated="959" table:default-cell-style-name="ce128"/>
        <table:table-column table:style-name="co11" table:number-columns-repeated="33" table:default-cell-style-name="Default"/>
        <table:table-row table:style-name="ro1">
          <table:table-cell table:style-name="ce1" office:value-type="string" calcext:value-type="string">
            <text:p>Лс</text:p>
          </table:table-cell>
          <table:table-cell table:style-name="ce1" office:value-type="string" calcext:value-type="string">
            <text:p>Паспорт</text:p>
          </table:table-cell>
          <table:table-cell table:style-name="ce1" office:value-type="string" calcext:value-type="string">
            <text:p>Группа</text:p>
          </table:table-cell>
          <table:table-cell table:style-name="ce1" office:value-type="string" calcext:value-type="string">
            <text:p>ФИ</text:p>
          </table:table-cell>
          <table:table-cell table:style-name="ce1" office:value-type="string" calcext:value-type="string">
            <text:p>Группа</text:p>
          </table:table-cell>
          <table:table-cell table:style-name="ce120" office:value-type="string" calcext:value-type="string">
            <text:p>Район</text:p>
          </table:table-cell>
          <table:table-cell table:style-name="ce120" office:value-type="string" calcext:value-type="string">
            <text:p>Код услуги</text:p>
          </table:table-cell>
          <table:table-cell table:style-name="ce120"/>
          <table:table-cell table:style-name="ce120" office:value-type="string" calcext:value-type="string">
            <text:p>Окато</text:p>
          </table:table-cell>
          <table:table-cell table:style-name="ce137" office:value-type="string" calcext:value-type="string">
            <text:p>Июль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1">
          <table:table-cell table:style-name="ce12" office:value-type="string" calcext:value-type="string">
            <text:p>26214099215</text:p>
          </table:table-cell>
          <table:table-cell table:style-name="ce60" office:value-type="float" office:value="9418719718" calcext:value-type="float">
            <text:p>9418719718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А***** ДИАНА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7" office:value-type="float" office:value="127.85" calcext:value-type="float">
            <text:p>127,85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1">
          <table:table-cell table:style-name="ce3" office:value-type="float" office:value="26214099126" calcext:value-type="float">
            <text:p>26214099126</text:p>
          </table:table-cell>
          <table:table-cell table:style-name="ce84" office:value-type="float" office:value="9421941038" calcext:value-type="float">
            <text:p>9421941038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А***** ЗАХАР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7" office:value-type="float" office:value="418.67" calcext:value-type="float">
            <text:p>418,67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1">
          <table:table-cell table:style-name="ce3" office:value-type="float" office:value="26214099127" calcext:value-type="float">
            <text:p>26214099127</text:p>
          </table:table-cell>
          <table:table-cell table:style-name="ce84" office:value-type="float" office:value="9414461845" calcext:value-type="float">
            <text:p>9414461845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А***** АДЕЛИНА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7" office:value-type="float" office:value="74.76" calcext:value-type="float">
            <text:p>74,76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1">
          <table:table-cell table:style-name="ce13" office:value-type="string" calcext:value-type="string">
            <text:p>26214099286</text:p>
          </table:table-cell>
          <table:table-cell table:style-name="ce36" office:value-type="float" office:value="8021411448" calcext:value-type="float">
            <text:p>8021411448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<text:span text:style-name="T1">А***** </text:span><text:span text:style-name="T2">АМЕЛИЯ</text:span>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7" office:value-type="float" office:value="0" calcext:value-type="float">
            <text:p>0,00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1">
          <table:table-cell table:style-name="ce3" office:value-type="float" office:value="26214099128" calcext:value-type="float">
            <text:p>26214099128</text:p>
          </table:table-cell>
          <table:table-cell table:style-name="ce84" office:value-type="float" office:value="9420898661" calcext:value-type="float">
            <text:p>9420898661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А***** ВИКТОРИЯ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8" office:value-type="float" office:value="1622.35" calcext:value-type="float">
            <text:p>1622,35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1">
          <table:table-cell table:style-name="ce3" office:value-type="float" office:value="26214099129" calcext:value-type="float">
            <text:p>26214099129</text:p>
          </table:table-cell>
          <table:table-cell table:style-name="ce84" office:value-type="float" office:value="9422013446" calcext:value-type="float">
            <text:p>9422013446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Б***** МИЯ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7" office:value-type="float" office:value="0" calcext:value-type="float">
            <text:p>0,00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1">
          <table:table-cell table:style-name="ce2" office:value-type="string" calcext:value-type="string">
            <text:p>26214099097</text:p>
          </table:table-cell>
          <table:table-cell table:style-name="ce84" office:value-type="float" office:value="9422012562" calcext:value-type="float">
            <text:p>9422012562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В***** МАТВЕЙ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Устиновский район</text:p>
          </table:table-cell>
          <table:table-cell table:style-name="ce84" office:value-type="string" calcext:value-type="string">
            <text:p>1834029619_1</text:p>
          </table:table-cell>
          <table:table-cell table:style-name="ce84" office:value-type="float" office:value="2130" calcext:value-type="float">
            <text:p>2130</text:p>
          </table:table-cell>
          <table:table-cell table:style-name="ce84" office:value-type="float" office:value="94701000" calcext:value-type="float">
            <text:p>94701000</text:p>
          </table:table-cell>
          <table:table-cell table:style-name="ce137" office:value-type="float" office:value="1278.44" calcext:value-type="float">
            <text:p>1278,44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1">
          <table:table-cell table:style-name="ce3" office:value-type="float" office:value="26214099130" calcext:value-type="float">
            <text:p>26214099130</text:p>
          </table:table-cell>
          <table:table-cell table:style-name="ce84" office:value-type="float" office:value="9406777319" calcext:value-type="float">
            <text:p>9406777319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Г***** АРТУР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7" office:value-type="float" office:value="1794.31" calcext:value-type="float">
            <text:p>1794,31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1">
          <table:table-cell table:style-name="ce3" office:value-type="float" office:value="26214099131" calcext:value-type="float">
            <text:p>26214099131</text:p>
          </table:table-cell>
          <table:table-cell table:style-name="ce84" office:value-type="float" office:value="9406735622" calcext:value-type="float">
            <text:p>9406735622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З***** АДЕЛИНА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7" office:value-type="float" office:value="0" calcext:value-type="float">
            <text:p>0,00</text:p>
          </table:table-cell>
          <table:table-cell table:style-name="ce120" table:number-columns-repeated="19"/>
          <table:table-cell table:style-name="ce127" table:number-columns-repeated="959"/>
          <table:table-cell table:number-columns-repeated="33"/>
        </table:table-row>
        <table:table-row table:style-name="ro2">
          <table:table-cell table:style-name="ce2" office:value-type="string" calcext:value-type="string">
            <text:p>26214099080</text:p>
          </table:table-cell>
          <table:table-cell table:style-name="ce84" office:value-type="float" office:value="9403183263" calcext:value-type="float">
            <text:p>9403183263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М***** ЕГОР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82" office:value-type="float" office:value="26214099166" calcext:value-type="float">
            <text:p>26214099166</text:p>
          </table:table-cell>
          <table:table-cell table:style-name="ce84" office:value-type="float" office:value="9420866090" calcext:value-type="float">
            <text:p>9420866090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М***** АМИР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190</text:p>
          </table:table-cell>
          <table:table-cell table:style-name="ce84" office:value-type="float" office:value="9413368573" calcext:value-type="float">
            <text:p>9413368573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Н***** КАРОЛИНА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26214099200</text:p>
          </table:table-cell>
          <table:table-cell table:style-name="ce84" office:value-type="float" office:value="9412285928" calcext:value-type="float">
            <text:p>9412285928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С***** АЛИСА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069.11" calcext:value-type="float">
            <text:p>1069,11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53" calcext:value-type="float">
            <text:p>26214099253</text:p>
          </table:table-cell>
          <table:table-cell table:style-name="ce34" office:value-type="float" office:value="9420866270" calcext:value-type="float">
            <text:p>9420866270</text:p>
          </table:table-cell>
          <table:table-cell table:style-name="ce68" office:value-type="string" calcext:value-type="string">
            <text:p>гр. 1</text:p>
          </table:table-cell>
          <table:table-cell table:style-name="ce68" office:value-type="string" calcext:value-type="string">
            <text:p>С***** КАМИЛЛА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622.35" calcext:value-type="float">
            <text:p>1622,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163</text:p>
          </table:table-cell>
          <table:table-cell table:style-name="ce84" office:value-type="float" office:value="9402697631" calcext:value-type="float">
            <text:p>9402697631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П***** МИЛАНА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Устиновский район</text:p>
          </table:table-cell>
          <table:table-cell table:style-name="ce84" office:value-type="string" calcext:value-type="string">
            <text:p>1834029619_1</text:p>
          </table:table-cell>
          <table:table-cell table:style-name="ce84" office:value-type="float" office:value="2130" calcext:value-type="float">
            <text:p>2130</text:p>
          </table:table-cell>
          <table:table-cell table:style-name="ce84" office:value-type="float" office:value="94701000" calcext:value-type="float">
            <text:p>94701000</text:p>
          </table:table-cell>
          <table:table-cell office:value-type="float" office:value="1622.35" calcext:value-type="float">
            <text:p>1622,35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34" calcext:value-type="float">
            <text:p>26214099134</text:p>
          </table:table-cell>
          <table:table-cell table:style-name="ce84" office:value-type="float" office:value="9421916535" calcext:value-type="float">
            <text:p>9421916535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П***** ЛИЛИЯ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762.58" calcext:value-type="float">
            <text:p>762,58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35" calcext:value-type="float">
            <text:p>26214099135</text:p>
          </table:table-cell>
          <table:table-cell table:style-name="ce84" office:value-type="float" office:value="9421917653" calcext:value-type="float">
            <text:p>9421917653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П***** БОГДАН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069.11" calcext:value-type="float">
            <text:p>1069,11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36" calcext:value-type="float">
            <text:p>26214099136</text:p>
          </table:table-cell>
          <table:table-cell table:style-name="ce44" office:value-type="float" office:value="9425307029" calcext:value-type="float">
            <text:p>9425307029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Р***** АЛЕКСАНДР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069.11" calcext:value-type="float">
            <text:p>1069,11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26214099288</text:p>
          </table:table-cell>
          <table:table-cell table:style-name="ce35" office:value-type="float" office:value="9421982593" calcext:value-type="float">
            <text:p>9421982593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С***** АНДРЕЙ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76.26" calcext:value-type="float">
            <text:p>76,26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39" calcext:value-type="float">
            <text:p>26214099139</text:p>
          </table:table-cell>
          <table:table-cell table:style-name="ce84" office:value-type="float" office:value="9418722468" calcext:value-type="float">
            <text:p>9418722468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С***** КИРА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590.62" calcext:value-type="float">
            <text:p>590,62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40" calcext:value-type="float">
            <text:p>26214099140</text:p>
          </table:table-cell>
          <table:table-cell table:style-name="ce84" office:value-type="float" office:value="9411229498" calcext:value-type="float">
            <text:p>9411229498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У***** УЛЬЯНА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590.62" calcext:value-type="float">
            <text:p>590,62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26214099287</text:p>
          </table:table-cell>
          <table:table-cell table:style-name="ce35" office:value-type="float" office:value="9418725306" calcext:value-type="float">
            <text:p>9418725306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Х***** АДЕЛИЯ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42" calcext:value-type="float">
            <text:p>26214099142</text:p>
          </table:table-cell>
          <table:table-cell table:style-name="ce84" office:value-type="float" office:value="9412297900" calcext:value-type="float">
            <text:p>9412297900</text:p>
          </table:table-cell>
          <table:table-cell table:style-name="ce84" office:value-type="string" calcext:value-type="string">
            <text:p>гр. 1</text:p>
          </table:table-cell>
          <table:table-cell table:style-name="ce84" office:value-type="string" calcext:value-type="string">
            <text:p>Э***** ВИКТОРИЯ</text:p>
          </table:table-cell>
          <table:table-cell table:style-name="ce84" office:value-type="string" calcext:value-type="string">
            <text:p>гр. 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106.49" calcext:value-type="float">
            <text:p>1106,49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47" calcext:value-type="float">
            <text:p>26214099147</text:p>
          </table:table-cell>
          <table:table-cell table:style-name="ce84" office:value-type="float" office:value="9420893001" calcext:value-type="float">
            <text:p>9420893001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А***** АГАТА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26214099198</text:p>
          </table:table-cell>
          <table:table-cell table:style-name="ce23" office:value-type="float" office:value="9420875090" calcext:value-type="float">
            <text:p>9420875090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А***** ВЛАДИСЛАВА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41</text:p>
          </table:table-cell>
          <table:table-cell table:style-name="ce84" office:value-type="float" office:value="9420911026" calcext:value-type="float">
            <text:p>9420911026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А***** НУРАЙ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42</text:p>
          </table:table-cell>
          <table:table-cell table:style-name="ce84" office:value-type="float" office:value="9412294080" calcext:value-type="float">
            <text:p>9412294080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Б***** НИКИТА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48" calcext:value-type="float">
            <text:p>26214099148</text:p>
          </table:table-cell>
          <table:table-cell table:style-name="ce35" office:value-type="float" office:value="9424224667" calcext:value-type="float">
            <text:p>9424224667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Б***** РОМАН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74.76" calcext:value-type="float">
            <text:p>74,76</text:p>
          </table:table-cell>
          <table:table-cell table:number-columns-repeated="1011"/>
        </table:table-row>
        <table:table-row table:style-name="ro1">
          <table:table-cell table:style-name="ce4" office:value-type="float" office:value="26214099087" calcext:value-type="float">
            <text:p>26214099087</text:p>
          </table:table-cell>
          <table:table-cell table:style-name="ce8" office:value-type="float" office:value="5717684138" calcext:value-type="float">
            <text:p>5717684138</text:p>
          </table:table-cell>
          <table:table-cell table:style-name="ce84" office:value-type="string" calcext:value-type="string">
            <text:p>гр. 2</text:p>
          </table:table-cell>
          <table:table-cell table:style-name="ce4" office:value-type="string" calcext:value-type="string">
            <text:p>В***** ДЕНИС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8" office:value-type="float" office:value="1278.44" calcext:value-type="float">
            <text:p>1278,44</text:p>
          </table:table-cell>
          <table:table-cell table:style-name="ce121" table:number-columns-repeated="19"/>
          <table:table-cell table:style-name="ce92" table:number-columns-repeated="959"/>
          <table:table-cell table:number-columns-repeated="33"/>
        </table:table-row>
        <table:table-row table:style-name="ro2">
          <table:table-cell table:style-name="ce3" office:value-type="float" office:value="26214099149" calcext:value-type="float">
            <text:p>26214099149</text:p>
          </table:table-cell>
          <table:table-cell table:style-name="ce84" office:value-type="float" office:value="8019929378" calcext:value-type="float">
            <text:p>8019929378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З***** САБРИНА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43</text:p>
          </table:table-cell>
          <table:table-cell table:style-name="ce84" office:value-type="float" office:value="8012617390" calcext:value-type="float">
            <text:p>8012617390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З***** КАМИЛЯ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44</text:p>
          </table:table-cell>
          <table:table-cell table:style-name="ce84" office:value-type="float" office:value="9408940003" calcext:value-type="float">
            <text:p>9408940003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И***** ТИМОФЕЙ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031</text:p>
          </table:table-cell>
          <table:table-cell table:style-name="ce84" office:value-type="float" office:value="9420853406" calcext:value-type="float">
            <text:p>9420853406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К***** АРИНА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26214099210</text:p>
          </table:table-cell>
          <table:table-cell table:style-name="ce60" office:value-type="float" office:value="9419830254" calcext:value-type="float">
            <text:p>9419830254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Л***** ВЛАДИМИР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82</text:p>
          </table:table-cell>
          <table:table-cell table:style-name="ce84" office:value-type="float" office:value="9417618004" calcext:value-type="float">
            <text:p>9417618004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Л***** ГРИГОРИЙ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590.62" calcext:value-type="float">
            <text:p>590,6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26214099199</text:p>
          </table:table-cell>
          <table:table-cell table:style-name="ce23" office:value-type="float" office:value="9419822243" calcext:value-type="float">
            <text:p>9419822243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М***** ДАНИЭЛЬ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46</text:p>
          </table:table-cell>
          <table:table-cell table:style-name="ce84" office:value-type="float" office:value="9415513392" calcext:value-type="float">
            <text:p>9415513392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М***** СОФИЯ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934.53" calcext:value-type="float">
            <text:p>934,5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079</text:p>
          </table:table-cell>
          <table:table-cell table:style-name="ce84" office:value-type="float" office:value="9410174310" calcext:value-type="float">
            <text:p>9410174310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М***** ГОРДЕЙ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033</text:p>
          </table:table-cell>
          <table:table-cell table:style-name="ce84" office:value-type="float" office:value="9416560045" calcext:value-type="float">
            <text:p>9416560045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Н***** ФЁДОР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074</text:p>
          </table:table-cell>
          <table:table-cell table:style-name="ce84" office:value-type="float" office:value="9419790183" calcext:value-type="float">
            <text:p>9419790183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П***** ОЛЬГА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450.4" calcext:value-type="float">
            <text:p>1450,4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48</text:p>
          </table:table-cell>
          <table:table-cell table:style-name="ce84" office:value-type="float" office:value="9420898364" calcext:value-type="float">
            <text:p>9420898364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П***** ИВАН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49</text:p>
          </table:table-cell>
          <table:table-cell table:style-name="ce84" office:value-type="float" office:value="9406780962" calcext:value-type="float">
            <text:p>9406780962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П***** МИХАИЛ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50</text:p>
          </table:table-cell>
          <table:table-cell table:style-name="ce84" office:value-type="float" office:value="9421939913" calcext:value-type="float">
            <text:p>9421939913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П***** ВЯЧЕСЛАВ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51</text:p>
          </table:table-cell>
          <table:table-cell table:style-name="ce84" office:value-type="float" office:value="9421969872" calcext:value-type="float">
            <text:p>9421969872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С***** ВЛАДИСЛАВА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52</text:p>
          </table:table-cell>
          <table:table-cell table:style-name="ce84" office:value-type="float" office:value="9418740004" calcext:value-type="float">
            <text:p>9418740004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С***** ЕЛИЗАВЕТА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934.53" calcext:value-type="float">
            <text:p>934,53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26214099289</text:p>
          </table:table-cell>
          <table:table-cell table:style-name="ce35" office:value-type="float" office:value="9421982593" calcext:value-type="float">
            <text:p>9421982593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С***** ТАИСИЯ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76.26" calcext:value-type="float">
            <text:p>76,26</text:p>
          </table:table-cell>
          <table:table-cell table:number-columns-repeated="1011"/>
        </table:table-row>
        <table:table-row table:style-name="ro1">
          <table:table-cell table:style-name="ce5" office:value-type="float" office:value="26214099093" calcext:value-type="float">
            <text:p>26214099093</text:p>
          </table:table-cell>
          <table:table-cell table:style-name="ce9" office:value-type="float" office:value="1418747703" calcext:value-type="float">
            <text:p>1418747703</text:p>
          </table:table-cell>
          <table:table-cell table:style-name="ce84" office:value-type="string" calcext:value-type="string">
            <text:p>гр. 2</text:p>
          </table:table-cell>
          <table:table-cell table:style-name="ce84" office:value-type="string" calcext:value-type="string">
            <text:p>Ш***** МАРГАРИТА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7" office:value-type="float" office:value="0" calcext:value-type="float">
            <text:p>0,00</text:p>
          </table:table-cell>
          <table:table-cell table:style-name="ce121" table:number-columns-repeated="19"/>
          <table:table-cell table:style-name="ce92" table:number-columns-repeated="959"/>
          <table:table-cell table:number-columns-repeated="33"/>
        </table:table-row>
        <table:table-row table:style-name="ro1">
          <table:table-cell table:style-name="ce11" office:value-type="float" office:value="26214099261" calcext:value-type="float">
            <text:p>26214099261</text:p>
          </table:table-cell>
          <table:table-cell table:style-name="ce34" office:value-type="float" office:value="9415489760" calcext:value-type="float">
            <text:p>9415489760</text:p>
          </table:table-cell>
          <table:table-cell table:style-name="ce70" office:value-type="string" calcext:value-type="string">
            <text:p>гр. 2</text:p>
          </table:table-cell>
          <table:table-cell table:style-name="ce70" office:value-type="string" calcext:value-type="string">
            <text:p>Н***** ГОРДЕЙ</text:p>
          </table:table-cell>
          <table:table-cell table:style-name="ce84" office:value-type="string" calcext:value-type="string">
            <text:p>гр. 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7" office:value-type="float" office:value="1069.11" calcext:value-type="float">
            <text:p>1069,11</text:p>
          </table:table-cell>
          <table:table-cell table:style-name="ce121" table:number-columns-repeated="19"/>
          <table:table-cell table:style-name="ce92" table:number-columns-repeated="959"/>
          <table:table-cell table:number-columns-repeated="33"/>
        </table:table-row>
        <table:table-row table:style-name="ro2">
          <table:table-cell table:style-name="ce2" office:value-type="string" calcext:value-type="string">
            <text:p>26214098835</text:p>
          </table:table-cell>
          <table:table-cell table:style-name="ce84" office:value-type="float" office:value="9419787377" calcext:value-type="float">
            <text:p>9419787377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С***** АНТОН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794.31" calcext:value-type="float">
            <text:p>1794,3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161</text:p>
          </table:table-cell>
          <table:table-cell table:style-name="ce84" office:value-type="float" office:value="9424171323" calcext:value-type="float">
            <text:p>9424171323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М***** АРСЕНИЙ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Устиновский район</text:p>
          </table:table-cell>
          <table:table-cell table:style-name="ce84" office:value-type="string" calcext:value-type="string">
            <text:p>1834029619_1</text:p>
          </table:table-cell>
          <table:table-cell table:style-name="ce84" office:value-type="float" office:value="2130" calcext:value-type="float">
            <text:p>2130</text:p>
          </table:table-cell>
          <table:table-cell table:style-name="ce84" office:value-type="float" office:value="94701000" calcext:value-type="float">
            <text:p>94701000</text:p>
          </table:table-cell>
          <table:table-cell table:style-name="ce139" office:value-type="float" office:value="759.52" calcext:value-type="float">
            <text:p>759,5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19</text:p>
          </table:table-cell>
          <table:table-cell table:style-name="ce84" office:value-type="float" office:value="9410099782" calcext:value-type="float">
            <text:p>9410099782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Б***** МАРК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106.49" calcext:value-type="float">
            <text:p>1106,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77</text:p>
          </table:table-cell>
          <table:table-cell table:style-name="ce84" office:value-type="float" office:value="9412274630" calcext:value-type="float">
            <text:p>9412274630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Б***** МИРОСЛАВА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622.35" calcext:value-type="float">
            <text:p>1622,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0</text:p>
          </table:table-cell>
          <table:table-cell table:style-name="ce84" office:value-type="float" office:value="9419809993" calcext:value-type="float">
            <text:p>9419809993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Б***** ИЛЬЯ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1</text:p>
          </table:table-cell>
          <table:table-cell table:style-name="ce84" office:value-type="float" office:value="9415494763" calcext:value-type="float">
            <text:p>9415494763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В***** ДАРЬЯ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762.58" calcext:value-type="float">
            <text:p>762,5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2</text:p>
          </table:table-cell>
          <table:table-cell table:style-name="ce84" office:value-type="float" office:value="9416578325" calcext:value-type="float">
            <text:p>9416578325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Г***** МИЯ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450.4" calcext:value-type="float">
            <text:p>1450,4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3</text:p>
          </table:table-cell>
          <table:table-cell table:style-name="ce84" office:value-type="float" office:value="9425234412" calcext:value-type="float">
            <text:p>9425234412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М***** НАЗАР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4</text:p>
          </table:table-cell>
          <table:table-cell table:style-name="ce84" office:value-type="float" office:value="9421922010" calcext:value-type="float">
            <text:p>9421922010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К***** ТИМОФЕЙ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5</text:p>
          </table:table-cell>
          <table:table-cell table:style-name="ce84" office:value-type="float" office:value="8020145454" calcext:value-type="float">
            <text:p>8020145454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К***** АМЕЛИЯ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54" calcext:value-type="float">
            <text:p>26214099154</text:p>
          </table:table-cell>
          <table:table-cell table:style-name="ce84" office:value-type="float" office:value="9417656791" calcext:value-type="float">
            <text:p>9417656791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К***** ЕВА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84</text:p>
          </table:table-cell>
          <table:table-cell table:style-name="ce84" office:value-type="float" office:value="9410114646" calcext:value-type="float">
            <text:p>9410114646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К***** ТИМУР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6</text:p>
          </table:table-cell>
          <table:table-cell table:style-name="ce84" office:value-type="float" office:value="9419805788" calcext:value-type="float">
            <text:p>9419805788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Л***** ДЕНИС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7</text:p>
          </table:table-cell>
          <table:table-cell table:style-name="ce84" office:value-type="float" office:value="9408965950" calcext:value-type="float">
            <text:p>9408965950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Л***** МИРОСЛАВА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069.11" calcext:value-type="float">
            <text:p>1069,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8</text:p>
          </table:table-cell>
          <table:table-cell table:style-name="ce84" office:value-type="float" office:value="9420867271" calcext:value-type="float">
            <text:p>9420867271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М***** ДАРЬЯ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622.35" calcext:value-type="float">
            <text:p>1622,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29</text:p>
          </table:table-cell>
          <table:table-cell table:style-name="ce84" office:value-type="float" office:value="9409041386" calcext:value-type="float">
            <text:p>9409041386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М***** АИША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30</text:p>
          </table:table-cell>
          <table:table-cell table:style-name="ce84" office:value-type="float" office:value="9416597817" calcext:value-type="float">
            <text:p>9416597817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Н***** МАКСИМ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32</text:p>
          </table:table-cell>
          <table:table-cell table:style-name="ce84" office:value-type="float" office:value="9420872671" calcext:value-type="float">
            <text:p>9420872671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Н***** ДИНАР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762.58" calcext:value-type="float">
            <text:p>762,5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34</text:p>
          </table:table-cell>
          <table:table-cell table:style-name="ce84" office:value-type="float" office:value="9410118279" calcext:value-type="float">
            <text:p>9410118279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П***** ПАВЕЛ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590.62" calcext:value-type="float">
            <text:p>590,6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37</text:p>
          </table:table-cell>
          <table:table-cell table:style-name="ce84" office:value-type="float" office:value="9420910626" calcext:value-type="float">
            <text:p>9420910626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Т***** ЕГОР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966.26" calcext:value-type="float">
            <text:p>1966,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38</text:p>
          </table:table-cell>
          <table:table-cell table:style-name="ce84" office:value-type="float" office:value="9412321995" calcext:value-type="float">
            <text:p>9412321995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Т***** ЛЕВ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897.16" calcext:value-type="float">
            <text:p>897,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39</text:p>
          </table:table-cell>
          <table:table-cell table:style-name="ce84" office:value-type="float" office:value="9411193635" calcext:value-type="float">
            <text:p>9411193635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Ф***** МИЛАНА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418.67" calcext:value-type="float">
            <text:p>418,6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40</text:p>
          </table:table-cell>
          <table:table-cell table:style-name="ce84" office:value-type="float" office:value="9420897490" calcext:value-type="float">
            <text:p>9420897490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Х***** АЛИНА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622.35" calcext:value-type="float">
            <text:p>1622,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084</text:p>
          </table:table-cell>
          <table:table-cell table:style-name="ce44" office:value-type="float" office:value="1720752711" calcext:value-type="float">
            <text:p>1720752711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П***** РОМАН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794.31" calcext:value-type="float">
            <text:p>1794,31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098" calcext:value-type="float">
            <text:p>26214099098</text:p>
          </table:table-cell>
          <table:table-cell table:style-name="ce23" office:value-type="float" office:value="9425299649" calcext:value-type="float">
            <text:p>9425299649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Д***** СОФЬЯ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4" office:value-type="float" office:value="26214079841" calcext:value-type="float">
            <text:p>26214079841</text:p>
          </table:table-cell>
          <table:table-cell table:style-name="ce8" office:value-type="float" office:value="9420872222" calcext:value-type="float">
            <text:p>9420872222</text:p>
          </table:table-cell>
          <table:table-cell table:style-name="ce84" office:value-type="string" calcext:value-type="string">
            <text:p>гр. 3</text:p>
          </table:table-cell>
          <table:table-cell table:style-name="ce84" office:value-type="string" calcext:value-type="string">
            <text:p>Б***** КИРА</text:p>
          </table:table-cell>
          <table:table-cell table:style-name="ce84" office:value-type="string" calcext:value-type="string">
            <text:p>гр. 3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03" calcext:value-type="float">
            <text:p>26214099103</text:p>
          </table:table-cell>
          <table:table-cell table:style-name="ce84" office:value-type="float" office:value="9406729719" calcext:value-type="float">
            <text:p>9406729719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Б***** ЮЛИАНА</text:p>
          </table:table-cell>
          <table:table-cell table:style-name="ce95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052.25" calcext:value-type="float">
            <text:p>2052,25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04" calcext:value-type="float">
            <text:p>26214099104</text:p>
          </table:table-cell>
          <table:table-cell table:style-name="ce84" office:value-type="float" office:value="3314293438" calcext:value-type="float">
            <text:p>3314293438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В***** ЛЕВ</text:p>
          </table:table-cell>
          <table:table-cell table:style-name="ce95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74.76" calcext:value-type="float">
            <text:p>74,76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05" calcext:value-type="float">
            <text:p>26214099105</text:p>
          </table:table-cell>
          <table:table-cell table:style-name="ce84" office:value-type="float" office:value="9418762941" calcext:value-type="float">
            <text:p>9418762941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В***** АНГЕЛИНА</text:p>
          </table:table-cell>
          <table:table-cell table:style-name="ce95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106.49" calcext:value-type="float">
            <text:p>1106,49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06" calcext:value-type="float">
            <text:p>26214099106</text:p>
          </table:table-cell>
          <table:table-cell table:style-name="ce84" office:value-type="float" office:value="9421958034" calcext:value-type="float">
            <text:p>9421958034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Г***** ЭМИЛЬ</text:p>
          </table:table-cell>
          <table:table-cell table:style-name="ce95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09.34" calcext:value-type="float">
            <text:p>209,34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07" calcext:value-type="float">
            <text:p>26214099107</text:p>
          </table:table-cell>
          <table:table-cell table:style-name="ce84" office:value-type="float" office:value="9412331290" calcext:value-type="float">
            <text:p>9412331290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Г***** БОГДАН</text:p>
          </table:table-cell>
          <table:table-cell table:style-name="ce95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09" calcext:value-type="float">
            <text:p>26214099109</text:p>
          </table:table-cell>
          <table:table-cell table:style-name="ce84" office:value-type="float" office:value="9409025064" calcext:value-type="float">
            <text:p>9409025064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З***** ЛИДИЯ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106.49" calcext:value-type="float">
            <text:p>1106,49</text:p>
          </table:table-cell>
          <table:table-cell table:number-columns-repeated="1011"/>
        </table:table-row>
        <table:table-row table:style-name="ro2">
          <table:table-cell table:style-name="ce30" office:value-type="string" calcext:value-type="string">
            <text:p>26214099295</text:p>
          </table:table-cell>
          <table:table-cell table:style-name="ce34" office:value-type="float" office:value="9405692658" calcext:value-type="float">
            <text:p>9405692658</text:p>
          </table:table-cell>
          <table:table-cell table:style-name="ce77" office:value-type="string" calcext:value-type="string">
            <text:p>гр. 5</text:p>
          </table:table-cell>
          <table:table-cell table:style-name="ce77" office:value-type="string" calcext:value-type="string">
            <text:p>И***** МИХАИЛ</text:p>
          </table:table-cell>
          <table:table-cell table:style-name="ce77" office:value-type="string" calcext:value-type="string">
            <text:p>гр. 5</text:p>
          </table:table-cell>
          <table:table-cell table:style-name="ce103" office:value-type="string" calcext:value-type="string">
            <text:p>Устиновский район</text:p>
          </table:table-cell>
          <table:table-cell table:style-name="ce103" office:value-type="string" calcext:value-type="string">
            <text:p>1834029619_1</text:p>
          </table:table-cell>
          <table:table-cell table:style-name="ce103" office:value-type="float" office:value="2130" calcext:value-type="float">
            <text:p>2130</text:p>
          </table:table-cell>
          <table:table-cell table:style-name="ce103" office:value-type="float" office:value="94701000" calcext:value-type="float">
            <text:p>94701000</text:p>
          </table:table-cell>
          <table:table-cell table:style-name="ce139" office:value-type="float" office:value="762.58" calcext:value-type="float">
            <text:p>762,58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10" calcext:value-type="float">
            <text:p>26214099110</text:p>
          </table:table-cell>
          <table:table-cell table:style-name="ce84" office:value-type="float" office:value="9408966036" calcext:value-type="float">
            <text:p>9408966036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И***** РОМАН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381.29" calcext:value-type="float">
            <text:p>381,29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11" calcext:value-type="float">
            <text:p>26214099111</text:p>
          </table:table-cell>
          <table:table-cell table:style-name="ce84" office:value-type="float" office:value="9410142800" calcext:value-type="float">
            <text:p>9410142800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К***** ДМИТРИЙ</text:p>
          </table:table-cell>
          <table:table-cell table:style-name="ce95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934.53" calcext:value-type="float">
            <text:p>934,53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12" calcext:value-type="float">
            <text:p>26214099112</text:p>
          </table:table-cell>
          <table:table-cell table:style-name="ce84" office:value-type="float" office:value="9414442079" calcext:value-type="float">
            <text:p>9414442079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М***** ЛЕВ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14" calcext:value-type="float">
            <text:p>26214099114</text:p>
          </table:table-cell>
          <table:table-cell table:style-name="ce84" office:value-type="float" office:value="9409018114" calcext:value-type="float">
            <text:p>9409018114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М***** МАКАР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3207.33" calcext:value-type="float">
            <text:p>3207,33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13" calcext:value-type="float">
            <text:p>26214099113</text:p>
          </table:table-cell>
          <table:table-cell table:style-name="ce84" office:value-type="float" office:value="9416578890" calcext:value-type="float">
            <text:p>9416578890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М***** ФЁДОР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18" calcext:value-type="float">
            <text:p>26214099118</text:p>
          </table:table-cell>
          <table:table-cell table:style-name="ce84" office:value-type="float" office:value="9419795895" calcext:value-type="float">
            <text:p>9419795895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П***** ЕВА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42" office:value-type="float" office:value="1450.4" calcext:value-type="float">
            <text:p>1450,40</text:p>
          </table:table-cell>
          <table:table-cell table:style-name="ce7" table:number-columns-repeated="978"/>
          <table:table-cell table:number-columns-repeated="33"/>
        </table:table-row>
        <table:table-row table:style-name="ro2">
          <table:table-cell table:style-name="ce3" office:value-type="float" office:value="26214099116" calcext:value-type="float">
            <text:p>26214099116</text:p>
          </table:table-cell>
          <table:table-cell table:style-name="ce84" office:value-type="float" office:value="9209866332" calcext:value-type="float">
            <text:p>9209866332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П***** ЗЛАТА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43" office:value-type="float" office:value="1622.35" calcext:value-type="float">
            <text:p>1622,35</text:p>
          </table:table-cell>
          <table:table-cell table:style-name="ce7" table:number-columns-repeated="978"/>
          <table:table-cell table:number-columns-repeated="33"/>
        </table:table-row>
        <table:table-row table:style-name="ro2">
          <table:table-cell table:style-name="ce3" office:value-type="float" office:value="26214099117" calcext:value-type="float">
            <text:p>26214099117</text:p>
          </table:table-cell>
          <table:table-cell table:style-name="ce84" office:value-type="float" office:value="9419801523" calcext:value-type="float">
            <text:p>9419801523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П***** МИХАИЛ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42" office:value-type="float" office:value="1794.31" calcext:value-type="float">
            <text:p>1794,31</text:p>
          </table:table-cell>
          <table:table-cell table:style-name="ce7" table:number-columns-repeated="978"/>
          <table:table-cell table:number-columns-repeated="33"/>
        </table:table-row>
        <table:table-row table:style-name="ro2">
          <table:table-cell table:style-name="ce3" office:value-type="float" office:value="26214099115" calcext:value-type="float">
            <text:p>26214099115</text:p>
          </table:table-cell>
          <table:table-cell table:style-name="ce84" office:value-type="float" office:value="9412288907" calcext:value-type="float">
            <text:p>9412288907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П***** ПОЛИНА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43" office:value-type="float" office:value="2138.22" calcext:value-type="float">
            <text:p>2138,22</text:p>
          </table:table-cell>
          <table:table-cell table:style-name="ce7" table:number-columns-repeated="978"/>
          <table:table-cell table:number-columns-repeated="33"/>
        </table:table-row>
        <table:table-row table:style-name="ro2">
          <table:table-cell table:style-name="ce3" office:value-type="float" office:value="26214099119" calcext:value-type="float">
            <text:p>26214099119</text:p>
          </table:table-cell>
          <table:table-cell table:style-name="ce84" office:value-type="float" office:value="9422000215" calcext:value-type="float">
            <text:p>9422000215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Р***** ЕВА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43" office:value-type="float" office:value="590.62" calcext:value-type="float">
            <text:p>590,62</text:p>
          </table:table-cell>
          <table:table-cell table:style-name="ce7" table:number-columns-repeated="978"/>
          <table:table-cell table:number-columns-repeated="33"/>
        </table:table-row>
        <table:table-row table:style-name="ro2">
          <table:table-cell table:style-name="ce3" office:value-type="float" office:value="26214099120" calcext:value-type="float">
            <text:p>26214099120</text:p>
          </table:table-cell>
          <table:table-cell table:style-name="ce84" office:value-type="float" office:value="9420881311" calcext:value-type="float">
            <text:p>9420881311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С***** АЛИСА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43" office:value-type="float" office:value="1622.35" calcext:value-type="float">
            <text:p>1622,35</text:p>
          </table:table-cell>
          <table:table-cell table:style-name="ce7" table:number-columns-repeated="978"/>
          <table:table-cell table:number-columns-repeated="33"/>
        </table:table-row>
        <table:table-row table:style-name="ro2">
          <table:table-cell table:style-name="ce3" office:value-type="float" office:value="26214099121" calcext:value-type="float">
            <text:p>26214099121</text:p>
          </table:table-cell>
          <table:table-cell table:style-name="ce84" office:value-type="float" office:value="9418724147" calcext:value-type="float">
            <text:p>9418724147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С***** АЛИСА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43" office:value-type="float" office:value="934.53" calcext:value-type="float">
            <text:p>934,53</text:p>
          </table:table-cell>
          <table:table-cell table:style-name="ce7" table:number-columns-repeated="978"/>
          <table:table-cell table:number-columns-repeated="33"/>
        </table:table-row>
        <table:table-row table:style-name="ro2">
          <table:table-cell table:style-name="ce3" office:value-type="float" office:value="26214099122" calcext:value-type="float">
            <text:p>26214099122</text:p>
          </table:table-cell>
          <table:table-cell table:style-name="ce84" office:value-type="float" office:value="9420883006" calcext:value-type="float">
            <text:p>9420883006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Т***** АЙЛИН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42" office:value-type="float" office:value="1794.31" calcext:value-type="float">
            <text:p>1794,31</text:p>
          </table:table-cell>
          <table:table-cell table:style-name="ce7" table:number-columns-repeated="978"/>
          <table:table-cell table:number-columns-repeated="33"/>
        </table:table-row>
        <table:table-row table:style-name="ro2">
          <table:table-cell table:style-name="ce3" office:value-type="float" office:value="26214099124" calcext:value-type="float">
            <text:p>26214099124</text:p>
          </table:table-cell>
          <table:table-cell table:style-name="ce84" office:value-type="float" office:value="9404506159" calcext:value-type="float">
            <text:p>9404506159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Ф***** ТАТЬЯНА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43" office:value-type="float" office:value="897.16" calcext:value-type="float">
            <text:p>897,16</text:p>
          </table:table-cell>
          <table:table-cell table:style-name="ce7" table:number-columns-repeated="978"/>
          <table:table-cell table:number-columns-repeated="33"/>
        </table:table-row>
        <table:table-row table:style-name="ro2">
          <table:table-cell table:style-name="ce3" office:value-type="float" office:value="26214099085" calcext:value-type="float">
            <text:p>26214099085</text:p>
          </table:table-cell>
          <table:table-cell table:style-name="ce84" office:value-type="float" office:value="9419821548" calcext:value-type="float">
            <text:p>9419821548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Ч***** МИРОСЛАВА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25" calcext:value-type="float">
            <text:p>26214099125</text:p>
          </table:table-cell>
          <table:table-cell table:style-name="ce84" office:value-type="float" office:value="9421941241" calcext:value-type="float">
            <text:p>9421941241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Ш***** ТАМЕРЛАН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934.53" calcext:value-type="float">
            <text:p>934,5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26214099207</text:p>
          </table:table-cell>
          <table:table-cell table:style-name="ce80" office:value-type="float" office:value="5725675788" calcext:value-type="float">
            <text:p>5725675788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Т***** ДЕМИД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26214099203</text:p>
          </table:table-cell>
          <table:table-cell table:style-name="ce84" office:value-type="float" office:value="9416574588" calcext:value-type="float">
            <text:p>9416574588</text:p>
          </table:table-cell>
          <table:table-cell table:style-name="ce84" office:value-type="string" calcext:value-type="string">
            <text:p>гр. 5</text:p>
          </table:table-cell>
          <table:table-cell table:style-name="ce84" office:value-type="string" calcext:value-type="string">
            <text:p>С***** УЛЬЯНА</text:p>
          </table:table-cell>
          <table:table-cell table:style-name="ce84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897.16" calcext:value-type="float">
            <text:p>897,16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33" calcext:value-type="float">
            <text:p>26214099233</text:p>
          </table:table-cell>
          <table:table-cell table:style-name="ce35" office:value-type="float" office:value="9415540859" calcext:value-type="float">
            <text:p>9415540859</text:p>
          </table:table-cell>
          <table:table-cell table:style-name="ce38" office:value-type="string" calcext:value-type="string">
            <text:p>гр. 5</text:p>
          </table:table-cell>
          <table:table-cell table:style-name="ce38" office:value-type="string" calcext:value-type="string">
            <text:p>К***** ВИКТОРИЯ</text:p>
          </table:table-cell>
          <table:table-cell table:style-name="ce39" office:value-type="string" calcext:value-type="string">
            <text:p>гр. 5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39</text:p>
          </table:table-cell>
          <table:table-cell table:style-name="ce84" office:value-type="float" office:value="9403382944" calcext:value-type="float">
            <text:p>9403382944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А***** КСЕНИ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40</text:p>
          </table:table-cell>
          <table:table-cell table:style-name="ce84" office:value-type="float" office:value="9423079905" calcext:value-type="float">
            <text:p>9423079905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А***** СОФИ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61</text:p>
          </table:table-cell>
          <table:table-cell table:style-name="ce84" office:value-type="float" office:value="9411208899" calcext:value-type="float">
            <text:p>9411208899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А***** САМИРА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08</text:p>
          </table:table-cell>
          <table:table-cell table:style-name="ce84" office:value-type="float" office:value="9419797572" calcext:value-type="float">
            <text:p>9419797572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Б***** РОМАН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106.49" calcext:value-type="float">
            <text:p>1106,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409</text:p>
          </table:table-cell>
          <table:table-cell table:style-name="ce84" office:value-type="float" office:value="9408927176" calcext:value-type="float">
            <text:p>9408927176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Б***** СОФИ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622.35" calcext:value-type="float">
            <text:p>1622,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41</text:p>
          </table:table-cell>
          <table:table-cell table:style-name="ce78" office:value-type="float" office:value="9425301899" calcext:value-type="float">
            <text:p>9425301899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Б***** АРТЕМ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590.62" calcext:value-type="float">
            <text:p>590,6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43</text:p>
          </table:table-cell>
          <table:table-cell table:style-name="ce84" office:value-type="float" office:value="9412269354" calcext:value-type="float">
            <text:p>9412269354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З***** ДАРЬ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44</text:p>
          </table:table-cell>
          <table:table-cell table:style-name="ce84" office:value-type="float" office:value="9422031036" calcext:value-type="float">
            <text:p>9422031036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И***** СОЛОМИ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45</text:p>
          </table:table-cell>
          <table:table-cell table:style-name="ce84" office:value-type="float" office:value="9424194693" calcext:value-type="float">
            <text:p>9424194693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К***** ТИМУР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46</text:p>
          </table:table-cell>
          <table:table-cell table:style-name="ce84" office:value-type="float" office:value="9416580918" calcext:value-type="float">
            <text:p>9416580918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К***** СОФИ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47</text:p>
          </table:table-cell>
          <table:table-cell table:style-name="ce84" office:value-type="float" office:value="9416583670" calcext:value-type="float">
            <text:p>9416583670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К***** ЯРОСЛАВ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106.49" calcext:value-type="float">
            <text:p>1106,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48</text:p>
          </table:table-cell>
          <table:table-cell table:style-name="ce84" office:value-type="float" office:value="9415541806" calcext:value-type="float">
            <text:p>9415541806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К***** ЕСЕНИ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49</text:p>
          </table:table-cell>
          <table:table-cell table:style-name="ce84" office:value-type="float" office:value="9411233006" calcext:value-type="float">
            <text:p>9411233006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Л***** КСЕНИ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966.26" calcext:value-type="float">
            <text:p>1966,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50</text:p>
          </table:table-cell>
          <table:table-cell table:style-name="ce84" office:value-type="float" office:value="9406776954" calcext:value-type="float">
            <text:p>9406776954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Л***** МАРТА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23.36" calcext:value-type="float">
            <text:p>123,3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99</text:p>
          </table:table-cell>
          <table:table-cell table:style-name="ce84" office:value-type="float" office:value="9419777596" calcext:value-type="float">
            <text:p>9419777596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Н***** ЗАРИНА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794.31" calcext:value-type="float">
            <text:p>1794,3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51</text:p>
          </table:table-cell>
          <table:table-cell table:style-name="ce84" office:value-type="float" office:value="9406715194" calcext:value-type="float">
            <text:p>9406715194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О***** ДМИТРИЙ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794.31" calcext:value-type="float">
            <text:p>1794,3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52</text:p>
          </table:table-cell>
          <table:table-cell table:style-name="ce84" office:value-type="float" office:value="9418732635" calcext:value-type="float">
            <text:p>9418732635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П***** ПОЛИНА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46.72" calcext:value-type="float">
            <text:p>246,7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53</text:p>
          </table:table-cell>
          <table:table-cell table:style-name="ce84" office:value-type="float" office:value="9413388564" calcext:value-type="float">
            <text:p>9413388564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П***** ПОЛИНА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55</text:p>
          </table:table-cell>
          <table:table-cell table:style-name="ce84" office:value-type="float" office:value="9405635878" calcext:value-type="float">
            <text:p>9405635878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С***** ЯНА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96</text:p>
          </table:table-cell>
          <table:table-cell table:style-name="ce84" office:value-type="float" office:value="9420872367" calcext:value-type="float">
            <text:p>9420872367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С***** МАРК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56</text:p>
          </table:table-cell>
          <table:table-cell table:style-name="ce84" office:value-type="float" office:value="9411211773" calcext:value-type="float">
            <text:p>9411211773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Т***** МИХАИЛ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381.29" calcext:value-type="float">
            <text:p>381,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57</text:p>
          </table:table-cell>
          <table:table-cell table:style-name="ce84" office:value-type="float" office:value="9412306586" calcext:value-type="float">
            <text:p>9412306586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Ф***** ИЛЬ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639.23" calcext:value-type="float">
            <text:p>639,2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58</text:p>
          </table:table-cell>
          <table:table-cell table:style-name="ce84" office:value-type="float" office:value="9210095849" calcext:value-type="float">
            <text:p>9210095849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Ч***** ИЛЬЯ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74.76" calcext:value-type="float">
            <text:p>74,7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59</text:p>
          </table:table-cell>
          <table:table-cell table:style-name="ce84" office:value-type="float" office:value="9419821548" calcext:value-type="float">
            <text:p>9419821548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Ч***** СТЕПАН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60</text:p>
          </table:table-cell>
          <table:table-cell table:style-name="ce84" office:value-type="float" office:value="9408903549" calcext:value-type="float">
            <text:p>9408903549</text:p>
          </table:table-cell>
          <table:table-cell table:style-name="ce84" office:value-type="string" calcext:value-type="string">
            <text:p>гр. 11</text:p>
          </table:table-cell>
          <table:table-cell table:style-name="ce84" office:value-type="string" calcext:value-type="string">
            <text:p>Ч***** МАКАР</text:p>
          </table:table-cell>
          <table:table-cell table:style-name="ce84" office:value-type="string" calcext:value-type="string">
            <text:p>гр. 11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794.31" calcext:value-type="float">
            <text:p>1794,31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26214099201</text:p>
          </table:table-cell>
          <table:table-cell table:style-name="ce84" office:value-type="float" office:value="9412285928" calcext:value-type="float">
            <text:p>9412285928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С***** КАРИНА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069.11" calcext:value-type="float">
            <text:p>1069,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63</text:p>
          </table:table-cell>
          <table:table-cell table:style-name="ce84" office:value-type="float" office:value="9419831053" calcext:value-type="float">
            <text:p>9419831053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Г***** АЙРАТ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64</text:p>
          </table:table-cell>
          <table:table-cell table:style-name="ce84" office:value-type="float" office:value="9419773145" calcext:value-type="float">
            <text:p>9419773145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Г***** ИРИНА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934.53" calcext:value-type="float">
            <text:p>934,53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02" calcext:value-type="float">
            <text:p>26214099102</text:p>
          </table:table-cell>
          <table:table-cell table:style-name="ce84" office:value-type="float" office:value="9419792330" calcext:value-type="float">
            <text:p>9419792330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Д***** ДАНИЛ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65</text:p>
          </table:table-cell>
          <table:table-cell table:style-name="ce84" office:value-type="float" office:value="9411266288" calcext:value-type="float">
            <text:p>9411266288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И***** КРИСТИНА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450.4" calcext:value-type="float">
            <text:p>1450,4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66</text:p>
          </table:table-cell>
          <table:table-cell table:style-name="ce84" office:value-type="float" office:value="9417650985" calcext:value-type="float">
            <text:p>9417650985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И***** МАРК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106.49" calcext:value-type="float">
            <text:p>1106,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67</text:p>
          </table:table-cell>
          <table:table-cell table:style-name="ce84" office:value-type="float" office:value="9409051873" calcext:value-type="float">
            <text:p>9409051873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К***** ЕВГЕНИЯ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69</text:p>
          </table:table-cell>
          <table:table-cell table:style-name="ce84" office:value-type="float" office:value="9411217221" calcext:value-type="float">
            <text:p>9411217221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К***** МИХАИЛ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71</text:p>
          </table:table-cell>
          <table:table-cell table:style-name="ce84" office:value-type="float" office:value="9409041990" calcext:value-type="float">
            <text:p>9409041990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К***** ДЕМИД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72</text:p>
          </table:table-cell>
          <table:table-cell table:style-name="ce84" office:value-type="float" office:value="9412331665" calcext:value-type="float">
            <text:p>9412331665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Л***** ДМИТРИЙ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73</text:p>
          </table:table-cell>
          <table:table-cell table:style-name="ce84" office:value-type="float" office:value="9424152909" calcext:value-type="float">
            <text:p>9424152909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Л***** ТИМОФЕЙ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74</text:p>
          </table:table-cell>
          <table:table-cell table:style-name="ce84" office:value-type="float" office:value="9404499954" calcext:value-type="float">
            <text:p>9404499954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М***** ГЛЕБ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75</text:p>
          </table:table-cell>
          <table:table-cell table:style-name="ce84" office:value-type="float" office:value="9417653373" calcext:value-type="float">
            <text:p>9417653373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М***** ЮЛИАНА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408</text:p>
          </table:table-cell>
          <table:table-cell table:style-name="ce84" office:value-type="float" office:value="9416589015" calcext:value-type="float">
            <text:p>9416589015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П***** АЛИСА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77</text:p>
          </table:table-cell>
          <table:table-cell table:style-name="ce84" office:value-type="float" office:value="9416582206" calcext:value-type="float">
            <text:p>9416582206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Р***** ДАЛИЛЬ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78</text:p>
          </table:table-cell>
          <table:table-cell table:style-name="ce84" office:value-type="float" office:value="9419842136" calcext:value-type="float">
            <text:p>9419842136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С***** РЕГИНА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09.34" calcext:value-type="float">
            <text:p>209,3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79</text:p>
          </table:table-cell>
          <table:table-cell table:style-name="ce84" office:value-type="float" office:value="9416579042" calcext:value-type="float">
            <text:p>9416579042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С***** ДАРЬЯ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418.67" calcext:value-type="float">
            <text:p>418,67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52" calcext:value-type="float">
            <text:p>26214099152</text:p>
          </table:table-cell>
          <table:table-cell table:style-name="ce84" office:value-type="float" office:value="9413393190" calcext:value-type="float">
            <text:p>9413393190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С***** ВАЛЕРИЯ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794.31" calcext:value-type="float">
            <text:p>1794,3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80</text:p>
          </table:table-cell>
          <table:table-cell table:style-name="ce84" office:value-type="float" office:value="9419797983" calcext:value-type="float">
            <text:p>9419797983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С***** ЕЛИЗАВЕТА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82</text:p>
          </table:table-cell>
          <table:table-cell table:style-name="ce84" office:value-type="float" office:value="9418746913" calcext:value-type="float">
            <text:p>9418746913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Т***** АРИАНА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83</text:p>
          </table:table-cell>
          <table:table-cell table:style-name="ce84" office:value-type="float" office:value="9407879237" calcext:value-type="float">
            <text:p>9407879237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У***** АНАСТАСИЯ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85</text:p>
          </table:table-cell>
          <table:table-cell table:style-name="ce84" office:value-type="float" office:value="9413377816" calcext:value-type="float">
            <text:p>9413377816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Ф***** ЯНИС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622.35" calcext:value-type="float">
            <text:p>1622,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84</text:p>
          </table:table-cell>
          <table:table-cell table:style-name="ce84" office:value-type="float" office:value="9419848493" calcext:value-type="float">
            <text:p>9419848493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Х***** СОФИЯ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88</text:p>
          </table:table-cell>
          <table:table-cell table:style-name="ce84" office:value-type="float" office:value="9411191487" calcext:value-type="float">
            <text:p>9411191487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Ш***** САВЕЛИЙ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87</text:p>
          </table:table-cell>
          <table:table-cell table:style-name="ce84" office:value-type="float" office:value="9411191487" calcext:value-type="float">
            <text:p>9411191487</text:p>
          </table:table-cell>
          <table:table-cell table:style-name="ce84" office:value-type="string" calcext:value-type="string">
            <text:p>гр. 8</text:p>
          </table:table-cell>
          <table:table-cell table:style-name="ce84" office:value-type="string" calcext:value-type="string">
            <text:p>Ш***** СОФИЯ</text:p>
          </table:table-cell>
          <table:table-cell table:style-name="ce84" office:value-type="string" calcext:value-type="string">
            <text:p>гр. 8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37" calcext:value-type="float">
            <text:p>26214099237</text:p>
          </table:table-cell>
          <table:table-cell table:style-name="ce35" office:value-type="float" office:value="9405670536" calcext:value-type="float">
            <text:p>9405670536</text:p>
          </table:table-cell>
          <table:table-cell table:style-name="ce38" office:value-type="string" calcext:value-type="string">
            <text:p>гр. 7</text:p>
          </table:table-cell>
          <table:table-cell table:style-name="ce81" office:value-type="string" calcext:value-type="string">
            <text:p>Б***** МИРОН</text:p>
          </table:table-cell>
          <table:table-cell table:style-name="ce38" office:value-type="string" calcext:value-type="string">
            <text:p>гр. 7</text:p>
          </table:table-cell>
          <table:table-cell table:style-name="ce107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908.48" calcext:value-type="float">
            <text:p>908,48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64" calcext:value-type="float">
            <text:p>26214099264</text:p>
          </table:table-cell>
          <table:table-cell table:style-name="ce35" office:value-type="float" office:value="9425250788" calcext:value-type="float">
            <text:p>9425250788</text:p>
          </table:table-cell>
          <table:table-cell table:style-name="ce38" office:value-type="string" calcext:value-type="string">
            <text:p>гр. 7</text:p>
          </table:table-cell>
          <table:table-cell table:style-name="ce81" office:value-type="string" calcext:value-type="string">
            <text:p>Д***** КСЕНИЯ</text:p>
          </table:table-cell>
          <table:table-cell table:style-name="ce38" office:value-type="string" calcext:value-type="string">
            <text:p>гр. 7</text:p>
          </table:table-cell>
          <table:table-cell table:style-name="ce107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02.57" calcext:value-type="float">
            <text:p>202,57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65" calcext:value-type="float">
            <text:p>26214099265</text:p>
          </table:table-cell>
          <table:table-cell table:style-name="ce35" office:value-type="float" office:value="9410125430" calcext:value-type="float">
            <text:p>9410125430</text:p>
          </table:table-cell>
          <table:table-cell table:style-name="ce38" office:value-type="string" calcext:value-type="string">
            <text:p>гр. 7</text:p>
          </table:table-cell>
          <table:table-cell table:style-name="ce81" office:value-type="string" calcext:value-type="string">
            <text:p>Д***** ВИКТОРИЯ</text:p>
          </table:table-cell>
          <table:table-cell table:style-name="ce38" office:value-type="string" calcext:value-type="string">
            <text:p>гр. 7</text:p>
          </table:table-cell>
          <table:table-cell table:style-name="ce107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6" office:value-type="float" office:value="26214099266" calcext:value-type="float">
            <text:p>26214099266</text:p>
          </table:table-cell>
          <table:table-cell table:style-name="ce61" office:value-type="float" office:value="5721023514" calcext:value-type="float">
            <text:p>5721023514</text:p>
          </table:table-cell>
          <table:table-cell table:style-name="ce66" office:value-type="string" calcext:value-type="string">
            <text:p>гр. 7</text:p>
          </table:table-cell>
          <table:table-cell table:style-name="ce85" office:value-type="string" calcext:value-type="string">
            <text:p>И***** АЛЕКСАНДРА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343.75" calcext:value-type="float">
            <text:p>343,75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38" calcext:value-type="float">
            <text:p>26214099238</text:p>
          </table:table-cell>
          <table:table-cell table:style-name="ce35" office:value-type="float" office:value="9407868027" calcext:value-type="float">
            <text:p>9407868027</text:p>
          </table:table-cell>
          <table:table-cell table:style-name="ce38" office:value-type="string" calcext:value-type="string">
            <text:p>гр. 7</text:p>
          </table:table-cell>
          <table:table-cell table:style-name="ce81" office:value-type="string" calcext:value-type="string">
            <text:p>И***** МАРИЯ</text:p>
          </table:table-cell>
          <table:table-cell table:style-name="ce38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54" calcext:value-type="float">
            <text:p>26214099254</text:p>
          </table:table-cell>
          <table:table-cell table:style-name="ce34" office:value-type="float" office:value="9423126804" calcext:value-type="float">
            <text:p>9423126804</text:p>
          </table:table-cell>
          <table:table-cell table:style-name="ce68" office:value-type="string" calcext:value-type="string">
            <text:p>гр. 7</text:p>
          </table:table-cell>
          <table:table-cell table:style-name="ce86" office:value-type="string" calcext:value-type="string">
            <text:p>И***** МАТВЕЙ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39" calcext:value-type="float">
            <text:p>26214099239</text:p>
          </table:table-cell>
          <table:table-cell table:style-name="ce35" office:value-type="float" office:value="9420853406" calcext:value-type="float">
            <text:p>9420853406</text:p>
          </table:table-cell>
          <table:table-cell table:style-name="ce38" office:value-type="string" calcext:value-type="string">
            <text:p>гр. 7</text:p>
          </table:table-cell>
          <table:table-cell table:style-name="ce81" office:value-type="string" calcext:value-type="string">
            <text:p>К***** АГЛАЯ</text:p>
          </table:table-cell>
          <table:table-cell table:style-name="ce38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67" calcext:value-type="float">
            <text:p>26214099267</text:p>
          </table:table-cell>
          <table:table-cell table:style-name="ce35" office:value-type="float" office:value="9411195034" calcext:value-type="float">
            <text:p>9411195034</text:p>
          </table:table-cell>
          <table:table-cell table:style-name="ce68" office:value-type="string" calcext:value-type="string">
            <text:p>гр. 7</text:p>
          </table:table-cell>
          <table:table-cell table:style-name="ce86" office:value-type="string" calcext:value-type="string">
            <text:p>К***** ГЕОРГИЙ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049.66" calcext:value-type="float">
            <text:p>1049,66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40" calcext:value-type="float">
            <text:p>26214099240</text:p>
          </table:table-cell>
          <table:table-cell table:style-name="ce35" office:value-type="float" office:value="9419790418" calcext:value-type="float">
            <text:p>9419790418</text:p>
          </table:table-cell>
          <table:table-cell table:style-name="ce38" office:value-type="string" calcext:value-type="string">
            <text:p>гр. 7</text:p>
          </table:table-cell>
          <table:table-cell table:style-name="ce81" office:value-type="string" calcext:value-type="string">
            <text:p>Л***** САВЕЛИЙ</text:p>
          </table:table-cell>
          <table:table-cell table:style-name="ce38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50" calcext:value-type="float">
            <text:p>26214099250</text:p>
          </table:table-cell>
          <table:table-cell table:style-name="ce34" office:value-type="float" office:value="9417617657" calcext:value-type="float">
            <text:p>9417617657</text:p>
          </table:table-cell>
          <table:table-cell table:style-name="ce68" office:value-type="string" calcext:value-type="string">
            <text:p>гр. 7</text:p>
          </table:table-cell>
          <table:table-cell table:style-name="ce86" office:value-type="string" calcext:value-type="string">
            <text:p>Л***** СОФИЯ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61.39" calcext:value-type="float">
            <text:p>61,39</text:p>
          </table:table-cell>
          <table:table-cell table:number-columns-repeated="1011"/>
        </table:table-row>
        <table:table-row table:style-name="ro2">
          <table:table-cell table:style-name="ce26" office:value-type="float" office:value="26214099268" calcext:value-type="float">
            <text:p>26214099268</text:p>
          </table:table-cell>
          <table:table-cell table:style-name="ce61" office:value-type="float" office:value="9418722402" calcext:value-type="float">
            <text:p>9418722402</text:p>
          </table:table-cell>
          <table:table-cell table:style-name="ce66" office:value-type="string" calcext:value-type="string">
            <text:p>гр. 7</text:p>
          </table:table-cell>
          <table:table-cell table:style-name="ce87" office:value-type="string" calcext:value-type="string">
            <text:p>М***** СЕВАСТЬЯН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049.66" calcext:value-type="float">
            <text:p>1049,66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41" calcext:value-type="float">
            <text:p>26214099241</text:p>
          </table:table-cell>
          <table:table-cell table:style-name="ce35" office:value-type="float" office:value="9419776248" calcext:value-type="float">
            <text:p>9419776248</text:p>
          </table:table-cell>
          <table:table-cell table:style-name="ce38" office:value-type="string" calcext:value-type="string">
            <text:p>гр. 7</text:p>
          </table:table-cell>
          <table:table-cell table:style-name="ce81" office:value-type="string" calcext:value-type="string">
            <text:p>П***** ТИМУР</text:p>
          </table:table-cell>
          <table:table-cell table:style-name="ce38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71" calcext:value-type="float">
            <text:p>26214099271</text:p>
          </table:table-cell>
          <table:table-cell table:style-name="ce35" office:value-type="float" office:value="9424204895" calcext:value-type="float">
            <text:p>9424204895</text:p>
          </table:table-cell>
          <table:table-cell table:style-name="ce38" office:value-type="string" calcext:value-type="string">
            <text:p>гр. 7</text:p>
          </table:table-cell>
          <table:table-cell table:style-name="ce81" office:value-type="string" calcext:value-type="string">
            <text:p>П***** СОФИЯ</text:p>
          </table:table-cell>
          <table:table-cell table:style-name="ce38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30.69" calcext:value-type="float">
            <text:p>30,69</text:p>
          </table:table-cell>
          <table:table-cell table:number-columns-repeated="1011"/>
        </table:table-row>
        <table:table-row table:style-name="ro2">
          <table:table-cell table:style-name="ce33" office:value-type="float" office:value="26214099270" calcext:value-type="float">
            <text:p>26214099270</text:p>
          </table:table-cell>
          <table:table-cell table:style-name="ce34" office:value-type="float" office:value="9420852193" calcext:value-type="float">
            <text:p>9420852193</text:p>
          </table:table-cell>
          <table:table-cell table:style-name="ce134" office:value-type="string" calcext:value-type="string">
            <text:p>гр. 7</text:p>
          </table:table-cell>
          <table:table-cell table:style-name="ce145" office:value-type="string" calcext:value-type="string">
            <text:p>П***** СОФЬЯ</text:p>
          </table:table-cell>
          <table:table-cell table:style-name="ce77" office:value-type="string" calcext:value-type="string">
            <text:p>гр. 7</text:p>
          </table:table-cell>
          <table:table-cell table:style-name="ce103" office:value-type="string" calcext:value-type="string">
            <text:p>Устиновский район</text:p>
          </table:table-cell>
          <table:table-cell table:style-name="ce103" office:value-type="string" calcext:value-type="string">
            <text:p>1834029619_1</text:p>
          </table:table-cell>
          <table:table-cell table:style-name="ce103" office:value-type="float" office:value="2130" calcext:value-type="float">
            <text:p>2130</text:p>
          </table:table-cell>
          <table:table-cell table:style-name="ce103" office:value-type="float" office:value="94701000" calcext:value-type="float">
            <text:p>94701000</text:p>
          </table:table-cell>
          <table:table-cell table:style-name="ce139" office:value-type="float" office:value="1049.66" calcext:value-type="float">
            <text:p>1049,66</text:p>
          </table:table-cell>
          <table:table-cell table:number-columns-repeated="1011"/>
        </table:table-row>
        <table:table-row table:style-name="ro2">
          <table:table-cell table:style-name="ce26" office:value-type="float" office:value="26214099272" calcext:value-type="float">
            <text:p>26214099272</text:p>
          </table:table-cell>
          <table:table-cell table:style-name="ce61" office:value-type="float" office:value="9416588373" calcext:value-type="float">
            <text:p>9416588373</text:p>
          </table:table-cell>
          <table:table-cell table:style-name="ce66" office:value-type="string" calcext:value-type="string">
            <text:p>гр. 7</text:p>
          </table:table-cell>
          <table:table-cell table:style-name="ce85" office:value-type="string" calcext:value-type="string">
            <text:p>Р***** ТИМОФЕЙ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049.66" calcext:value-type="float">
            <text:p>1049,66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55" calcext:value-type="float">
            <text:p>26214099255</text:p>
          </table:table-cell>
          <table:table-cell table:style-name="ce34" office:value-type="float" office:value="9421952645" calcext:value-type="float">
            <text:p>9421952645</text:p>
          </table:table-cell>
          <table:table-cell table:style-name="ce68" office:value-type="string" calcext:value-type="string">
            <text:p>гр. 7</text:p>
          </table:table-cell>
          <table:table-cell table:style-name="ce86" office:value-type="string" calcext:value-type="string">
            <text:p>Р***** АВРОРА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6" office:value-type="float" office:value="26214099273" calcext:value-type="float">
            <text:p>26214099273</text:p>
          </table:table-cell>
          <table:table-cell table:style-name="ce61" office:value-type="float" office:value="9407858610" calcext:value-type="float">
            <text:p>9407858610</text:p>
          </table:table-cell>
          <table:table-cell table:style-name="ce66" office:value-type="string" calcext:value-type="string">
            <text:p>гр. 7</text:p>
          </table:table-cell>
          <table:table-cell table:style-name="ce85" office:value-type="string" calcext:value-type="string">
            <text:p>С***** ДАНИЛ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595.42" calcext:value-type="float">
            <text:p>595,42</text:p>
          </table:table-cell>
          <table:table-cell table:number-columns-repeated="1011"/>
        </table:table-row>
        <table:table-row table:style-name="ro2">
          <table:table-cell table:style-name="ce27" office:value-type="float" office:value="26214099262" calcext:value-type="float">
            <text:p>26214099262</text:p>
          </table:table-cell>
          <table:table-cell table:style-name="ce34" office:value-type="float" office:value="9407874590" calcext:value-type="float">
            <text:p>9407874590</text:p>
          </table:table-cell>
          <table:table-cell table:style-name="ce74" office:value-type="string" calcext:value-type="string">
            <text:p>гр. 7</text:p>
          </table:table-cell>
          <table:table-cell table:style-name="ce86" office:value-type="string" calcext:value-type="string">
            <text:p>С***** КАЛЕРИЯ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524.82" calcext:value-type="float">
            <text:p>524,82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47" calcext:value-type="float">
            <text:p>26214099247</text:p>
          </table:table-cell>
          <table:table-cell table:style-name="ce35" office:value-type="float" office:value="9421942984" calcext:value-type="float">
            <text:p>9421942984</text:p>
          </table:table-cell>
          <table:table-cell table:style-name="ce38" office:value-type="string" calcext:value-type="string">
            <text:p>гр. 7</text:p>
          </table:table-cell>
          <table:table-cell table:style-name="ce88" office:value-type="string" calcext:value-type="string">
            <text:p>С***** ЛЕВ</text:p>
          </table:table-cell>
          <table:table-cell table:style-name="ce38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02.57" calcext:value-type="float">
            <text:p>202,57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56" calcext:value-type="float">
            <text:p>26214099256</text:p>
          </table:table-cell>
          <table:table-cell table:style-name="ce34" office:value-type="float" office:value="9413359947" calcext:value-type="float">
            <text:p>9413359947</text:p>
          </table:table-cell>
          <table:table-cell table:style-name="ce68" office:value-type="string" calcext:value-type="string">
            <text:p>гр. 7</text:p>
          </table:table-cell>
          <table:table-cell table:style-name="ce86" office:value-type="string" calcext:value-type="string">
            <text:p>Т***** РОМАН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48" calcext:value-type="float">
            <text:p>26214099248</text:p>
          </table:table-cell>
          <table:table-cell table:style-name="ce35" office:value-type="float" office:value="9411209140" calcext:value-type="float">
            <text:p>9411209140</text:p>
          </table:table-cell>
          <table:table-cell table:style-name="ce38" office:value-type="string" calcext:value-type="string">
            <text:p>гр. 7</text:p>
          </table:table-cell>
          <table:table-cell table:style-name="ce88" office:value-type="string" calcext:value-type="string">
            <text:p>Т***** ДАНИИЛ</text:p>
          </table:table-cell>
          <table:table-cell table:style-name="ce38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484.93" calcext:value-type="float">
            <text:p>484,93</text:p>
          </table:table-cell>
          <table:table-cell table:number-columns-repeated="1011"/>
        </table:table-row>
        <table:table-row table:style-name="ro2">
          <table:table-cell table:style-name="ce27" office:value-type="float" office:value="26214099274" calcext:value-type="float">
            <text:p>26214099274</text:p>
          </table:table-cell>
          <table:table-cell table:style-name="ce56" office:value-type="float" office:value="9418716641" calcext:value-type="float">
            <text:p>9418716641</text:p>
          </table:table-cell>
          <table:table-cell table:style-name="ce68" office:value-type="string" calcext:value-type="string">
            <text:p>гр. 7</text:p>
          </table:table-cell>
          <table:table-cell table:style-name="ce70" office:value-type="string" calcext:value-type="string">
            <text:p>Х***** ЕЛИЗАВЕТА</text:p>
          </table:table-cell>
          <table:table-cell table:style-name="ce77" office:value-type="string" calcext:value-type="string">
            <text:p>гр. 7</text:p>
          </table:table-cell>
          <table:table-cell table:style-name="ce103" office:value-type="string" calcext:value-type="string">
            <text:p>Устиновский район</text:p>
          </table:table-cell>
          <table:table-cell table:style-name="ce103" office:value-type="string" calcext:value-type="string">
            <text:p>1834029619_1</text:p>
          </table:table-cell>
          <table:table-cell table:style-name="ce103" office:value-type="float" office:value="2130" calcext:value-type="float">
            <text:p>2130</text:p>
          </table:table-cell>
          <table:table-cell table:style-name="ce103" office:value-type="float" office:value="94701000" calcext:value-type="float">
            <text:p>94701000</text:p>
          </table:table-cell>
          <table:table-cell office:value-type="float" office:value="1049.66" calcext:value-type="float">
            <text:p>1049,66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52" calcext:value-type="float">
            <text:p>26214099252</text:p>
          </table:table-cell>
          <table:table-cell table:style-name="ce34" office:value-type="float" office:value="9424152619" calcext:value-type="float">
            <text:p>9424152619</text:p>
          </table:table-cell>
          <table:table-cell table:style-name="ce68" office:value-type="string" calcext:value-type="string">
            <text:p>гр. 7</text:p>
          </table:table-cell>
          <table:table-cell table:style-name="ce86" office:value-type="string" calcext:value-type="string">
            <text:p>Ш***** ЕГОР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049.66" calcext:value-type="float">
            <text:p>1049,66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75" calcext:value-type="float">
            <text:p>26214099275</text:p>
          </table:table-cell>
          <table:table-cell table:style-name="ce35" office:value-type="float" office:value="9413396102" calcext:value-type="float">
            <text:p>9413396102</text:p>
          </table:table-cell>
          <table:table-cell table:style-name="ce68" office:value-type="string" calcext:value-type="string">
            <text:p>гр. 7</text:p>
          </table:table-cell>
          <table:table-cell table:style-name="ce86" office:value-type="string" calcext:value-type="string">
            <text:p>Ш***** ЛЕВ</text:p>
          </table:table-cell>
          <table:table-cell table:style-name="ce66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26214099302</text:p>
          </table:table-cell>
          <table:table-cell table:style-name="ce84" office:value-type="float" office:value="9417657395" calcext:value-type="float">
            <text:p>9417657395</text:p>
          </table:table-cell>
          <table:table-cell table:style-name="ce84" office:value-type="string" calcext:value-type="string">
            <text:p>гр. 7</text:p>
          </table:table-cell>
          <table:table-cell table:style-name="ce84" office:value-type="string" calcext:value-type="string">
            <text:p>Ч***** МАТВЕЙ</text:p>
          </table:table-cell>
          <table:table-cell table:style-name="ce84" office:value-type="string" calcext:value-type="string">
            <text:p>гр. 7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049.66" calcext:value-type="float">
            <text:p>1049,6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336</text:p>
          </table:table-cell>
          <table:table-cell table:style-name="ce84" office:value-type="float" office:value="9418727074" calcext:value-type="float">
            <text:p>9418727074</text:p>
          </table:table-cell>
          <table:table-cell table:style-name="ce84" office:value-type="string" calcext:value-type="string">
            <text:p>гр. 12</text:p>
          </table:table-cell>
          <table:table-cell table:style-name="ce84" office:value-type="string" calcext:value-type="string">
            <text:p>Я***** АНАСТАСИЯ</text:p>
          </table:table-cell>
          <table:table-cell table:style-name="ce84" office:value-type="string" calcext:value-type="string">
            <text:p>гр. 12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26214099209</text:p>
          </table:table-cell>
          <table:table-cell table:style-name="ce84" office:value-type="float" office:value="9416588910" calcext:value-type="float">
            <text:p>9416588910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Б***** ЕВГЕНИЯ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6490</text:p>
          </table:table-cell>
          <table:table-cell table:style-name="ce84" office:value-type="float" office:value="9423090964" calcext:value-type="float">
            <text:p>9423090964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Б***** НИКИТА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069.11" calcext:value-type="float">
            <text:p>1069,11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55" calcext:value-type="float">
            <text:p>26214099155</text:p>
          </table:table-cell>
          <table:table-cell table:style-name="ce84" office:value-type="float" office:value="9412313104" calcext:value-type="float">
            <text:p>9412313104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Б***** ЯРОСЛАВ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53</text:p>
          </table:table-cell>
          <table:table-cell table:style-name="ce84" office:value-type="float" office:value="9420872166" calcext:value-type="float">
            <text:p>9420872166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В***** ВАРВАРА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418.67" calcext:value-type="float">
            <text:p>418,6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54</text:p>
          </table:table-cell>
          <table:table-cell table:style-name="ce84" office:value-type="float" office:value="9418725347" calcext:value-type="float">
            <text:p>9418725347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Г***** МАКСИМ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57</text:p>
          </table:table-cell>
          <table:table-cell table:style-name="ce84" office:value-type="float" office:value="9708722113" calcext:value-type="float">
            <text:p>9708722113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Д***** АЛЁНА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099" calcext:value-type="float">
            <text:p>26214099099</text:p>
          </table:table-cell>
          <table:table-cell table:style-name="ce84" office:value-type="float" office:value="9420897254" calcext:value-type="float">
            <text:p>9420897254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Д***** КОНСТАНТИН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59</text:p>
          </table:table-cell>
          <table:table-cell table:style-name="ce84" office:value-type="float" office:value="9411205050" calcext:value-type="float">
            <text:p>9411205050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Е***** ЮЛИЯ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58</text:p>
          </table:table-cell>
          <table:table-cell table:style-name="ce84" office:value-type="float" office:value="9415513969" calcext:value-type="float">
            <text:p>9415513969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Е***** ДАНИЛА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966.26" calcext:value-type="float">
            <text:p>1966,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63</text:p>
          </table:table-cell>
          <table:table-cell table:style-name="ce84" office:value-type="float" office:value="9411191650" calcext:value-type="float">
            <text:p>9411191650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К***** СОФИЯ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622.35" calcext:value-type="float">
            <text:p>1622,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64</text:p>
          </table:table-cell>
          <table:table-cell table:style-name="ce84" office:value-type="float" office:value="9418736200" calcext:value-type="float">
            <text:p>9418736200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К***** АРТЁМ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100</text:p>
          </table:table-cell>
          <table:table-cell table:style-name="ce10" office:value-type="float" office:value="9415509920" calcext:value-type="float">
            <text:p>9415509920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М***** ВИКТОРИЯ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74.76" calcext:value-type="float">
            <text:p>74,7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65</text:p>
          </table:table-cell>
          <table:table-cell table:style-name="ce84" office:value-type="float" office:value="9413356480" calcext:value-type="float">
            <text:p>9413356480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М***** ТИМОФЕЙ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66</text:p>
          </table:table-cell>
          <table:table-cell table:style-name="ce84" office:value-type="float" office:value="9420889258" calcext:value-type="float">
            <text:p>9420889258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М***** ТИМОФЕЙ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106.49" calcext:value-type="float">
            <text:p>1106,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67</text:p>
          </table:table-cell>
          <table:table-cell table:style-name="ce84" office:value-type="float" office:value="9411244077" calcext:value-type="float">
            <text:p>9411244077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Н***** АМЕЛИЯ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966.26" calcext:value-type="float">
            <text:p>1966,26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26214099300</text:p>
          </table:table-cell>
          <table:table-cell table:style-name="ce44" office:value-type="float" office:value="9421932026" calcext:value-type="float">
            <text:p>9421932026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П***** ЭВЕЛИНА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934.53" calcext:value-type="float">
            <text:p>934,5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68</text:p>
          </table:table-cell>
          <table:table-cell table:style-name="ce84" office:value-type="float" office:value="9411203626" calcext:value-type="float">
            <text:p>9411203626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Р***** МАКСИМ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71</text:p>
          </table:table-cell>
          <table:table-cell table:style-name="ce84" office:value-type="float" office:value="9410094725" calcext:value-type="float">
            <text:p>9410094725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С***** МАРИЯ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72</text:p>
          </table:table-cell>
          <table:table-cell table:style-name="ce84" office:value-type="float" office:value="9412297985" calcext:value-type="float">
            <text:p>9412297985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Т***** МАРК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077</text:p>
          </table:table-cell>
          <table:table-cell table:style-name="ce84" office:value-type="float" office:value="9418746913" calcext:value-type="float">
            <text:p>9418746913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Т***** ДАВИД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56" calcext:value-type="float">
            <text:p>26214099156</text:p>
          </table:table-cell>
          <table:table-cell table:style-name="ce84" office:value-type="float" office:value="9413396102" calcext:value-type="float">
            <text:p>9413396102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Ш***** ВЕРА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37.39" calcext:value-type="float">
            <text:p>37,3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9076</text:p>
          </table:table-cell>
          <table:table-cell table:style-name="ce84" office:value-type="float" office:value="9406783081" calcext:value-type="float">
            <text:p>9406783081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Ш***** ИВАН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74</text:p>
          </table:table-cell>
          <table:table-cell table:style-name="ce84" office:value-type="float" office:value="9406809324" calcext:value-type="float">
            <text:p>9406809324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Ш***** ТАИСИЯ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6214098875</text:p>
          </table:table-cell>
          <table:table-cell table:style-name="ce84" office:value-type="float" office:value="9216042412" calcext:value-type="float">
            <text:p>9216042412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Ш***** СЕМЁН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278.44" calcext:value-type="float">
            <text:p>1278,44</text:p>
          </table:table-cell>
          <table:table-cell table:number-columns-repeated="1011"/>
        </table:table-row>
        <table:table-row table:style-name="ro2">
          <table:table-cell table:style-name="ce3" office:value-type="float" office:value="26214099157" calcext:value-type="float">
            <text:p>26214099157</text:p>
          </table:table-cell>
          <table:table-cell table:style-name="ce84" office:value-type="float" office:value="9412307046" calcext:value-type="float">
            <text:p>9412307046</text:p>
          </table:table-cell>
          <table:table-cell table:style-name="ce84" office:value-type="string" calcext:value-type="string">
            <text:p>гр. 10</text:p>
          </table:table-cell>
          <table:table-cell table:style-name="ce84" office:value-type="string" calcext:value-type="string">
            <text:p>Я***** КИРА</text:p>
          </table:table-cell>
          <table:table-cell table:style-name="ce84" office:value-type="string" calcext:value-type="string">
            <text:p>гр. 10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2138.22" calcext:value-type="float">
            <text:p>2138,22</text:p>
          </table:table-cell>
          <table:table-cell table:number-columns-repeated="1011"/>
        </table:table-row>
        <table:table-row table:style-name="ro2">
          <table:table-cell table:style-name="ce48" office:value-type="float" office:value="26214099234" calcext:value-type="float">
            <text:p>26214099234</text:p>
          </table:table-cell>
          <table:table-cell table:style-name="ce102" office:value-type="float" office:value="9424224667" calcext:value-type="float">
            <text:p>9424224667</text:p>
          </table:table-cell>
          <table:table-cell table:style-name="ce81" office:value-type="string" calcext:value-type="string">
            <text:p>гр. 6</text:p>
          </table:table-cell>
          <table:table-cell table:style-name="ce81" office:value-type="string" calcext:value-type="string">
            <text:p>Б***** ДАРЬЯ</text:p>
          </table:table-cell>
          <table:table-cell table:style-name="ce88" office:value-type="string" calcext:value-type="string">
            <text:p>гр. 6</text:p>
          </table:table-cell>
          <table:table-cell table:style-name="ce80" office:value-type="string" calcext:value-type="string">
            <text:p>Устиновский район</text:p>
          </table:table-cell>
          <table:table-cell table:style-name="ce80" office:value-type="string" calcext:value-type="string">
            <text:p>1834029619_1</text:p>
          </table:table-cell>
          <table:table-cell table:style-name="ce80" office:value-type="float" office:value="2130" calcext:value-type="float">
            <text:p>2130</text:p>
          </table:table-cell>
          <table:table-cell table:style-name="ce80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51" office:value-type="float" office:value="26214099276" calcext:value-type="float">
            <text:p>26214099276</text:p>
          </table:table-cell>
          <table:table-cell table:style-name="ce104" office:value-type="float" office:value="9421930178" calcext:value-type="float">
            <text:p>9421930178</text:p>
          </table:table-cell>
          <table:table-cell table:style-name="ce125" office:value-type="string" calcext:value-type="string">
            <text:p>гр. 6</text:p>
          </table:table-cell>
          <table:table-cell table:style-name="ce140" office:value-type="string" calcext:value-type="string">
            <text:p>В***** <text:span text:style-name="T3">ЕВА</text:span></text:p>
          </table:table-cell>
          <table:table-cell table:style-name="ce149" office:value-type="string" calcext:value-type="string">
            <text:p>гр. 6</text:p>
          </table:table-cell>
          <table:table-cell table:style-name="ce149" office:value-type="string" calcext:value-type="string">
            <text:p>Устиновский район</text:p>
          </table:table-cell>
          <table:table-cell table:style-name="ce149" office:value-type="string" calcext:value-type="string">
            <text:p>1834029619_1</text:p>
          </table:table-cell>
          <table:table-cell table:style-name="ce149" office:value-type="float" office:value="2130" calcext:value-type="float">
            <text:p>2130</text:p>
          </table:table-cell>
          <table:table-cell table:style-name="ce149" office:value-type="float" office:value="94701000" calcext:value-type="float">
            <text:p>94701000</text:p>
          </table:table-cell>
          <table:table-cell table:style-name="ce139" office:value-type="float" office:value="1755.57" calcext:value-type="float">
            <text:p>1755,57</text:p>
          </table:table-cell>
          <table:table-cell table:number-columns-repeated="1011"/>
        </table:table-row>
        <table:table-row table:style-name="ro1">
          <table:table-cell table:style-name="ce24" office:value-type="float" office:value="26214099277" calcext:value-type="float">
            <text:p>26214099277</text:p>
          </table:table-cell>
          <table:table-cell table:style-name="ce35" office:value-type="float" office:value="9421958034" calcext:value-type="float">
            <text:p>9421958034</text:p>
          </table:table-cell>
          <table:table-cell table:style-name="ce38" office:value-type="string" calcext:value-type="string">
            <text:p>гр. 6</text:p>
          </table:table-cell>
          <table:table-cell table:style-name="ce38" office:value-type="string" calcext:value-type="string">
            <text:p>Г***** КАРИНА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71.87" calcext:value-type="float">
            <text:p>171,87</text:p>
          </table:table-cell>
          <table:table-cell table:style-name="ce58" table:number-columns-repeated="19"/>
          <table:table-cell table:style-name="ce64" table:number-columns-repeated="959"/>
          <table:table-cell table:style-name="ce66" table:number-columns-repeated="33"/>
        </table:table-row>
        <table:table-row table:style-name="ro1">
          <table:table-cell table:style-name="ce11" office:value-type="float" office:value="26214099249" calcext:value-type="float">
            <text:p>26214099249</text:p>
          </table:table-cell>
          <table:table-cell table:style-name="ce34" office:value-type="float" office:value="9422020182" calcext:value-type="float">
            <text:p>9422020182</text:p>
          </table:table-cell>
          <table:table-cell table:style-name="ce70" office:value-type="string" calcext:value-type="string">
            <text:p>гр. 6</text:p>
          </table:table-cell>
          <table:table-cell table:style-name="ce70" office:value-type="string" calcext:value-type="string">
            <text:p>Д***** СОФИЯ</text:p>
          </table:table-cell>
          <table:table-cell table:style-name="ce83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877.78" calcext:value-type="float">
            <text:p>877,78</text:p>
          </table:table-cell>
          <table:table-cell table:style-name="ce58" table:number-columns-repeated="19"/>
          <table:table-cell table:style-name="ce64" table:number-columns-repeated="959"/>
          <table:table-cell table:style-name="ce66" table:number-columns-repeated="33"/>
        </table:table-row>
        <table:table-row table:style-name="ro1">
          <table:table-cell table:style-name="ce40" office:value-type="string" calcext:value-type="string">
            <text:p>26214099278</text:p>
          </table:table-cell>
          <table:table-cell table:style-name="ce56" office:value-type="float" office:value="9420872305" calcext:value-type="float">
            <text:p>9420872305</text:p>
          </table:table-cell>
          <table:table-cell table:style-name="ce77" office:value-type="string" calcext:value-type="string">
            <text:p>гр. 6</text:p>
          </table:table-cell>
          <table:table-cell table:style-name="ce77" office:value-type="string" calcext:value-type="string">
            <text:p>З***** <text:span text:style-name="T3">АРИАНА</text:span></text:p>
          </table:table-cell>
          <table:table-cell table:style-name="ce77" office:value-type="string" calcext:value-type="string">
            <text:p>гр. 6</text:p>
          </table:table-cell>
          <table:table-cell table:style-name="ce103" office:value-type="string" calcext:value-type="string">
            <text:p>Устиновский район</text:p>
          </table:table-cell>
          <table:table-cell table:style-name="ce103" office:value-type="string" calcext:value-type="string">
            <text:p>1834029619_1</text:p>
          </table:table-cell>
          <table:table-cell table:style-name="ce103" office:value-type="float" office:value="2130" calcext:value-type="float">
            <text:p>2130</text:p>
          </table:table-cell>
          <table:table-cell table:style-name="ce103" office:value-type="float" office:value="94701000" calcext:value-type="float">
            <text:p>94701000</text:p>
          </table:table-cell>
          <table:table-cell office:value-type="float" office:value="626.11" calcext:value-type="float">
            <text:p>626,11</text:p>
          </table:table-cell>
          <table:table-cell table:style-name="ce58" table:number-columns-repeated="19"/>
          <table:table-cell table:style-name="ce64" table:number-columns-repeated="959"/>
          <table:table-cell table:style-name="ce66" table:number-columns-repeated="33"/>
        </table:table-row>
        <table:table-row table:style-name="ro1">
          <table:table-cell table:style-name="ce24" office:value-type="float" office:value="26214099242" calcext:value-type="float">
            <text:p>26214099242</text:p>
          </table:table-cell>
          <table:table-cell table:style-name="ce35" office:value-type="float" office:value="9411266288" calcext:value-type="float">
            <text:p>9411266288</text:p>
          </table:table-cell>
          <table:table-cell table:style-name="ce38" office:value-type="string" calcext:value-type="string">
            <text:p>гр. 6</text:p>
          </table:table-cell>
          <table:table-cell table:style-name="ce38" office:value-type="string" calcext:value-type="string">
            <text:p>И***** КСЕНИЯ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049.66" calcext:value-type="float">
            <text:p>1049,66</text:p>
          </table:table-cell>
          <table:table-cell table:style-name="ce58" table:number-columns-repeated="19"/>
          <table:table-cell table:style-name="ce64" table:number-columns-repeated="959"/>
          <table:table-cell table:style-name="ce66" table:number-columns-repeated="33"/>
        </table:table-row>
        <table:table-row table:style-name="ro1">
          <table:table-cell table:style-name="ce24" office:value-type="float" office:value="26214099279" calcext:value-type="float">
            <text:p>26214099279</text:p>
          </table:table-cell>
          <table:table-cell table:style-name="ce35" office:value-type="float" office:value="5717590332" calcext:value-type="float">
            <text:p>5717590332</text:p>
          </table:table-cell>
          <table:table-cell table:style-name="ce38" office:value-type="string" calcext:value-type="string">
            <text:p>гр. 6</text:p>
          </table:table-cell>
          <table:table-cell table:style-name="ce38" office:value-type="string" calcext:value-type="string">
            <text:p>К***** ЕСЕНИЯ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473.2" calcext:value-type="float">
            <text:p>1473,20</text:p>
          </table:table-cell>
          <table:table-cell table:style-name="ce58" table:number-columns-repeated="19"/>
          <table:table-cell table:style-name="ce64" table:number-columns-repeated="959"/>
          <table:table-cell table:style-name="ce66" table:number-columns-repeated="33"/>
        </table:table-row>
        <table:table-row table:style-name="ro1">
          <table:table-cell table:style-name="ce24" office:value-type="float" office:value="26214099243" calcext:value-type="float">
            <text:p>26214099243</text:p>
          </table:table-cell>
          <table:table-cell table:style-name="ce35" office:value-type="float" office:value="9411233006" calcext:value-type="float">
            <text:p>9411233006</text:p>
          </table:table-cell>
          <table:table-cell table:style-name="ce38" office:value-type="string" calcext:value-type="string">
            <text:p>гр. 6</text:p>
          </table:table-cell>
          <table:table-cell table:style-name="ce38" office:value-type="string" calcext:value-type="string">
            <text:p>Л***** АЛЕКСАНДРА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1755.57" calcext:value-type="float">
            <text:p>1755,57</text:p>
          </table:table-cell>
          <table:table-cell table:style-name="ce58" table:number-columns-repeated="19"/>
          <table:table-cell table:style-name="ce64" table:number-columns-repeated="959"/>
          <table:table-cell table:style-name="ce66" table:number-columns-repeated="33"/>
        </table:table-row>
        <table:table-row table:style-name="ro2">
          <table:table-cell table:style-name="ce24" office:value-type="float" office:value="26214099235" calcext:value-type="float">
            <text:p>26214099235</text:p>
          </table:table-cell>
          <table:table-cell table:style-name="ce36" office:value-type="float" office:value="9411204152" calcext:value-type="float">
            <text:p>9411204152</text:p>
          </table:table-cell>
          <table:table-cell table:style-name="ce38" office:value-type="string" calcext:value-type="string">
            <text:p>гр. 6</text:p>
          </table:table-cell>
          <table:table-cell table:style-name="ce38" office:value-type="string" calcext:value-type="string">
            <text:p>М***** АЛЕКСАНДРА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755.57" calcext:value-type="float">
            <text:p>1755,57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26214099280</text:p>
          </table:table-cell>
          <table:table-cell table:style-name="ce56" office:value-type="float" office:value="9416597817" calcext:value-type="float">
            <text:p>9416597817</text:p>
          </table:table-cell>
          <table:table-cell table:style-name="ce77" office:value-type="string" calcext:value-type="string">
            <text:p>гр. 6</text:p>
          </table:table-cell>
          <table:table-cell table:style-name="ce75" office:value-type="string" calcext:value-type="string">
            <text:p>Н***** <text:span text:style-name="T3">АРТЁМ</text:span></text:p>
          </table:table-cell>
          <table:table-cell table:style-name="ce77" office:value-type="string" calcext:value-type="string">
            <text:p>гр. 6</text:p>
          </table:table-cell>
          <table:table-cell table:style-name="ce103" office:value-type="string" calcext:value-type="string">
            <text:p>Устиновский район</text:p>
          </table:table-cell>
          <table:table-cell table:style-name="ce103" office:value-type="string" calcext:value-type="string">
            <text:p>1834029619_1</text:p>
          </table:table-cell>
          <table:table-cell table:style-name="ce103" office:value-type="float" office:value="2130" calcext:value-type="float">
            <text:p>2130</text:p>
          </table:table-cell>
          <table:table-cell table:style-name="ce103" office:value-type="float" office:value="94701000" calcext:value-type="float">
            <text:p>94701000</text:p>
          </table:table-cell>
          <table:table-cell table:style-name="ce139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36" calcext:value-type="float">
            <text:p>26214099236</text:p>
          </table:table-cell>
          <table:table-cell table:style-name="ce35" office:value-type="float" office:value="9423104740" calcext:value-type="float">
            <text:p>9423104740</text:p>
          </table:table-cell>
          <table:table-cell table:style-name="ce38" office:value-type="string" calcext:value-type="string">
            <text:p>гр. 6</text:p>
          </table:table-cell>
          <table:table-cell table:style-name="ce38" office:value-type="string" calcext:value-type="string">
            <text:p>П***** МАКСИМ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1755.57" calcext:value-type="float">
            <text:p>1755,57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81" calcext:value-type="float">
            <text:p>26214099281</text:p>
          </table:table-cell>
          <table:table-cell table:style-name="ce35" office:value-type="float" office:value="4621042454" calcext:value-type="float">
            <text:p>4621042454</text:p>
          </table:table-cell>
          <table:table-cell table:style-name="ce38" office:value-type="string" calcext:value-type="string">
            <text:p>гр. 6</text:p>
          </table:table-cell>
          <table:table-cell table:style-name="ce38" office:value-type="string" calcext:value-type="string">
            <text:p>Н***** ИВАН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343.75" calcext:value-type="float">
            <text:p>343,75</text:p>
          </table:table-cell>
          <table:table-cell table:number-columns-repeated="1011"/>
        </table:table-row>
        <table:table-row table:style-name="ro2">
          <table:table-cell table:style-name="ce31" office:value-type="string" calcext:value-type="string">
            <text:p>26214099258</text:p>
          </table:table-cell>
          <table:table-cell table:style-name="ce34" office:value-type="float" office:value="9418706803" calcext:value-type="float">
            <text:p>9418706803</text:p>
          </table:table-cell>
          <table:table-cell table:style-name="ce75" office:value-type="string" calcext:value-type="string">
            <text:p>гр. 6</text:p>
          </table:table-cell>
          <table:table-cell table:style-name="ce75" office:value-type="string" calcext:value-type="string">
            <text:p>Н***** ТИМУР</text:p>
          </table:table-cell>
          <table:table-cell table:style-name="ce75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484.93" calcext:value-type="float">
            <text:p>484,93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59" calcext:value-type="float">
            <text:p>26214099259</text:p>
          </table:table-cell>
          <table:table-cell table:style-name="ce34" office:value-type="float" office:value="9422042419" calcext:value-type="float">
            <text:p>9422042419</text:p>
          </table:table-cell>
          <table:table-cell table:style-name="ce76" office:value-type="string" calcext:value-type="string">
            <text:p>гр. 6</text:p>
          </table:table-cell>
          <table:table-cell table:style-name="ce70" office:value-type="string" calcext:value-type="string">
            <text:p>П***** ЕФИМ</text:p>
          </table:table-cell>
          <table:table-cell table:style-name="ce76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44" calcext:value-type="float">
            <text:p>26214099244</text:p>
          </table:table-cell>
          <table:table-cell table:style-name="ce35" office:value-type="float" office:value="9422039415" calcext:value-type="float">
            <text:p>9422039415</text:p>
          </table:table-cell>
          <table:table-cell table:style-name="ce38" office:value-type="string" calcext:value-type="string">
            <text:p>гр. 6</text:p>
          </table:table-cell>
          <table:table-cell table:style-name="ce39" office:value-type="string" calcext:value-type="string">
            <text:p>П***** ЛЕОНИД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767.3" calcext:value-type="float">
            <text:p>767,30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45" calcext:value-type="float">
            <text:p>26214099245</text:p>
          </table:table-cell>
          <table:table-cell table:style-name="ce35" office:value-type="float" office:value="3321700132" calcext:value-type="float">
            <text:p>3321700132</text:p>
          </table:table-cell>
          <table:table-cell table:style-name="ce38" office:value-type="string" calcext:value-type="string">
            <text:p>гр. 6</text:p>
          </table:table-cell>
          <table:table-cell table:style-name="ce39" office:value-type="string" calcext:value-type="string">
            <text:p>П***** ДИАНА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626.11" calcext:value-type="float">
            <text:p>626,11</text:p>
          </table:table-cell>
          <table:table-cell table:number-columns-repeated="1011"/>
        </table:table-row>
        <table:table-row table:style-name="ro2">
          <table:table-cell table:style-name="ce24" office:value-type="float" office:value="26214099246" calcext:value-type="float">
            <text:p>26214099246</text:p>
          </table:table-cell>
          <table:table-cell table:style-name="ce35" office:value-type="float" office:value="9210095947" calcext:value-type="float">
            <text:p>9210095947</text:p>
          </table:table-cell>
          <table:table-cell table:style-name="ce38" office:value-type="string" calcext:value-type="string">
            <text:p>гр. 6</text:p>
          </table:table-cell>
          <table:table-cell table:style-name="ce39" office:value-type="string" calcext:value-type="string">
            <text:p>П***** ИВАН</text:p>
          </table:table-cell>
          <table:table-cell table:style-name="ce38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595.42" calcext:value-type="float">
            <text:p>595,42</text:p>
          </table:table-cell>
          <table:table-cell table:number-columns-repeated="1011"/>
        </table:table-row>
        <table:table-row table:style-name="ro2">
          <table:table-cell table:style-name="ce27" office:value-type="float" office:value="26214099284" calcext:value-type="float">
            <text:p>26214099284</text:p>
          </table:table-cell>
          <table:table-cell table:style-name="ce35" office:value-type="float" office:value="9415538195" calcext:value-type="float">
            <text:p>9415538195</text:p>
          </table:table-cell>
          <table:table-cell table:style-name="ce68" office:value-type="string" calcext:value-type="string">
            <text:p>гр. 6</text:p>
          </table:table-cell>
          <table:table-cell table:style-name="ce68" office:value-type="string" calcext:value-type="string">
            <text:p>Т***** АРСЕНИЙ</text:p>
          </table:table-cell>
          <table:table-cell table:style-name="ce84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table:style-name="ce139" office:value-type="float" office:value="877.78" calcext:value-type="float">
            <text:p>877,78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94" calcext:value-type="float">
            <text:p>26214099294</text:p>
          </table:table-cell>
          <table:table-cell table:style-name="ce34" office:value-type="float" office:value="9422039047" calcext:value-type="float">
            <text:p>9422039047</text:p>
          </table:table-cell>
          <table:table-cell table:style-name="ce68" office:value-type="string" calcext:value-type="string">
            <text:p>гр. 6</text:p>
          </table:table-cell>
          <table:table-cell table:style-name="ce144" office:value-type="string" calcext:value-type="string">
            <text:p>Ч***** СОФИЯ</text:p>
          </table:table-cell>
          <table:table-cell table:style-name="ce77" office:value-type="string" calcext:value-type="string">
            <text:p>гр. 6</text:p>
          </table:table-cell>
          <table:table-cell table:style-name="ce103" office:value-type="string" calcext:value-type="string">
            <text:p>Устиновский район</text:p>
          </table:table-cell>
          <table:table-cell table:style-name="ce103" office:value-type="string" calcext:value-type="string">
            <text:p>1834029619_1</text:p>
          </table:table-cell>
          <table:table-cell table:style-name="ce103" office:value-type="float" office:value="2130" calcext:value-type="float">
            <text:p>2130</text:p>
          </table:table-cell>
          <table:table-cell table:style-name="ce103" office:value-type="float" office:value="94701000" calcext:value-type="float">
            <text:p>94701000</text:p>
          </table:table-cell>
          <table:table-cell office:value-type="float" office:value="1049.66" calcext:value-type="float">
            <text:p>1049,66</text:p>
          </table:table-cell>
          <table:table-cell table:number-columns-repeated="1011"/>
        </table:table-row>
        <table:table-row table:style-name="ro2">
          <table:table-cell table:style-name="ce55" office:value-type="float" office:value="26214099285" calcext:value-type="float">
            <text:p>26214099285</text:p>
          </table:table-cell>
          <table:table-cell table:style-name="ce108" office:value-type="float" office:value="9422023817" calcext:value-type="float">
            <text:p>9422023817</text:p>
          </table:table-cell>
          <table:table-cell table:style-name="ce134" office:value-type="string" calcext:value-type="string">
            <text:p>гр. 6</text:p>
          </table:table-cell>
          <table:table-cell table:style-name="ce145" office:value-type="string" calcext:value-type="string">
            <text:p>Ш***** МАРГАРИТА</text:p>
          </table:table-cell>
          <table:table-cell table:style-name="ce77" office:value-type="string" calcext:value-type="string">
            <text:p>гр. 6</text:p>
          </table:table-cell>
          <table:table-cell table:style-name="ce103" office:value-type="string" calcext:value-type="string">
            <text:p>Устиновский район</text:p>
          </table:table-cell>
          <table:table-cell table:style-name="ce103" office:value-type="string" calcext:value-type="string">
            <text:p>1834029619_1</text:p>
          </table:table-cell>
          <table:table-cell table:style-name="ce103" office:value-type="float" office:value="2130" calcext:value-type="float">
            <text:p>2130</text:p>
          </table:table-cell>
          <table:table-cell table:style-name="ce103" office:value-type="float" office:value="94701000" calcext:value-type="float">
            <text:p>94701000</text:p>
          </table:table-cell>
          <table:table-cell table:style-name="ce139" office:value-type="float" office:value="908.48" calcext:value-type="float">
            <text:p>908,48</text:p>
          </table:table-cell>
          <table:table-cell table:number-columns-repeated="1011"/>
        </table:table-row>
        <table:table-row table:style-name="ro2">
          <table:table-cell table:style-name="ce31" office:value-type="string" calcext:value-type="string">
            <text:p>26214099251</text:p>
          </table:table-cell>
          <table:table-cell table:style-name="ce34" office:value-type="float" office:value="9407884892" calcext:value-type="float">
            <text:p>9407884892</text:p>
          </table:table-cell>
          <table:table-cell table:style-name="ce77" office:value-type="string" calcext:value-type="string">
            <text:p>гр. 6</text:p>
          </table:table-cell>
          <table:table-cell table:style-name="ce77" office:value-type="string" calcext:value-type="string">
            <text:p>Я***** МИРОН</text:p>
          </table:table-cell>
          <table:table-cell table:style-name="ce77" office:value-type="string" calcext:value-type="string">
            <text:p>гр. 6</text:p>
          </table:table-cell>
          <table:table-cell table:style-name="ce121" office:value-type="string" calcext:value-type="string">
            <text:p>Устиновский район</text:p>
          </table:table-cell>
          <table:table-cell table:style-name="ce121" office:value-type="string" calcext:value-type="string">
            <text:p>1834029619_1</text:p>
          </table:table-cell>
          <table:table-cell table:style-name="ce121" office:value-type="float" office:value="2130" calcext:value-type="float">
            <text:p>2130</text:p>
          </table:table-cell>
          <table:table-cell table:style-name="ce121" office:value-type="float" office:value="94701000" calcext:value-type="float">
            <text:p>94701000</text:p>
          </table:table-cell>
          <table:table-cell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31" office:value-type="string" calcext:value-type="string">
            <text:p>26214099292</text:p>
          </table:table-cell>
          <table:table-cell table:style-name="ce34" office:value-type="float" office:value="9408941474" calcext:value-type="float">
            <text:p>9408941474</text:p>
          </table:table-cell>
          <table:table-cell table:style-name="ce77" office:value-type="string" calcext:value-type="string">
            <text:p>гр. 6</text:p>
          </table:table-cell>
          <table:table-cell table:style-name="ce77" office:value-type="string" calcext:value-type="string">
            <text:p>Д***** МИЯ</text:p>
          </table:table-cell>
          <table:table-cell table:style-name="ce77" office:value-type="string" calcext:value-type="string">
            <text:p>гр. 6</text:p>
          </table:table-cell>
          <table:table-cell table:style-name="ce103" office:value-type="string" calcext:value-type="string">
            <text:p>Устиновский район</text:p>
          </table:table-cell>
          <table:table-cell table:style-name="ce103" office:value-type="string" calcext:value-type="string">
            <text:p>1834029619_1</text:p>
          </table:table-cell>
          <table:table-cell table:style-name="ce103" office:value-type="float" office:value="2130" calcext:value-type="float">
            <text:p>2130</text:p>
          </table:table-cell>
          <table:table-cell table:style-name="ce103" office:value-type="float" office:value="94701000" calcext:value-type="float">
            <text:p>94701000</text:p>
          </table:table-cell>
          <table:table-cell office:value-type="float" office:value="1755.57" calcext:value-type="float">
            <text:p>1755,57</text:p>
          </table:table-cell>
          <table:table-cell table:number-columns-repeated="1011"/>
        </table:table-row>
        <table:table-row table:style-name="ro2">
          <table:table-cell table:style-name="ce11" office:value-type="float" office:value="26214099293" calcext:value-type="float">
            <text:p>26214099293</text:p>
          </table:table-cell>
          <table:table-cell table:style-name="ce34" office:value-type="float" office:value="9423093799" calcext:value-type="float">
            <text:p>9423093799</text:p>
          </table:table-cell>
          <table:table-cell table:style-name="ce68" office:value-type="string" calcext:value-type="string">
            <text:p>гр. 6</text:p>
          </table:table-cell>
          <table:table-cell table:style-name="ce147" office:value-type="string" calcext:value-type="string">
            <text:p>Ш***** АНГЕЛИНА</text:p>
          </table:table-cell>
          <table:table-cell table:style-name="ce77" office:value-type="string" calcext:value-type="string">
            <text:p>гр. 6</text:p>
          </table:table-cell>
          <table:table-cell table:style-name="ce103" office:value-type="string" calcext:value-type="string">
            <text:p>Устиновский район</text:p>
          </table:table-cell>
          <table:table-cell table:style-name="ce103" office:value-type="string" calcext:value-type="string">
            <text:p>1834029619_1</text:p>
          </table:table-cell>
          <table:table-cell table:style-name="ce103" office:value-type="float" office:value="2130" calcext:value-type="float">
            <text:p>2130</text:p>
          </table:table-cell>
          <table:table-cell table:style-name="ce103" office:value-type="float" office:value="94701000" calcext:value-type="float">
            <text:p>94701000</text:p>
          </table:table-cell>
          <table:table-cell office:value-type="float" office:value="1049.66" calcext:value-type="float">
            <text:p>1049,66</text:p>
          </table:table-cell>
          <table:table-cell table:number-columns-repeated="1011"/>
        </table:table-row>
        <table:table-row table:style-name="ro2" table:number-rows-repeated="7">
          <table:table-cell table:style-name="ce84" table:number-columns-repeated="3"/>
          <table:table-cell table:number-columns-repeated="1018"/>
        </table:table-row>
        <table:table-row table:style-name="ro2" table:number-rows-repeated="104834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р.</number:text>
    </number:number-style>
    <number:number-style style:name="N11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5P2" style:volatile="true">
      <number:text> </number:text>
      <number:fill-character> </number:fill-character>
      <number:text>-р.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0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09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10P0"/>
    </number:number-style>
    <number:number-style style:name="N1011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2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2P0"/>
    </number:number-style>
    <number:number-style style:name="N10113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3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3P0"/>
    </number:number-style>
    <number:date-style style:name="N10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5" number:language="ru" number:country="RU">
      <number:month number:textual="true"/>
      <number:text>.</number:text>
      <number:year/>
    </number:date-style>
    <number:time-style style:name="N10116" number:language="ru" number:country="RU">
      <number:hours/>
      <number:text>:</number:text>
      <number:minute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number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number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number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number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number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number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3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.799cm" fo:margin-right="1.799cm" style:print-page-order="ttb" style:first-page-number="continue" style:scale-to="8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.00.0000</text:date>, <text:time style:data-style-name="N2" text:time-value="09:11:51.382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Главная" style:display-name="PageStyle_Главна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оп_20_начисление_20_1" style:display-name="PageStyle_Доп начисление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оп_20_начисление_20_от_20_28.02.2024" style:display-name="PageStyle_Доп начисление от 28.02.202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орр._20_начислений_20_от_20_21.03.2024" style:display-name="PageStyle_Корр. начислений от 21.03.202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оп._20_начисление_20_от_20_26.03.2024" style:display-name="PageStyle_Доп. начисление от 26.03.202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оп._20_нач._20_по_20_ПОУ_20_от_20_27.03.2024" style:display-name="PageStyle_Доп. нач. по ПОУ от 27.03.202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7-14T10:42:39.522000000</dc:date>
    <meta:generator>LibreOffice/7.2.1.2$Windows_x86 LibreOffice_project/87b77fad49947c1441b67c559c339af8f3517e22</meta:generator>
    <meta:editing-duration>P5DT38M12S</meta:editing-duration>
    <meta:editing-cycles>2041</meta:editing-cycles>
    <meta:document-statistic meta:table-count="1" meta:cell-count="2249" meta:object-count="0"/>
  </office:meta>
</office:document-meta>
</file>